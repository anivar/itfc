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90000023EF9B9E7755FA053C7.png" manifest:media-type="image/png"/>
  <manifest:file-entry manifest:full-path="Pictures/1000000000000539000002621E4E2CCFE00EB2E3.png" manifest:media-type="image/png"/>
  <manifest:file-entry manifest:full-path="Pictures/100000000000053D000001A9AF6DEBD9E46509B6.png" manifest:media-type="image/png"/>
  <manifest:file-entry manifest:full-path="Pictures/10000000000005520000015CE817BF74CE47924D.png" manifest:media-type="image/png"/>
  <manifest:file-entry manifest:full-path="Pictures/100000000000053A00000203F4F01774768BD022.png" manifest:media-type="image/png"/>
  <manifest:file-entry manifest:full-path="Pictures/100000000000025D00000154DF7B8B97588501B9.jpg" manifest:media-type="image/jpeg"/>
  <manifest:file-entry manifest:full-path="Pictures/1000000000000548000002220B948C6599965B17.png" manifest:media-type="image/png"/>
  <manifest:file-entry manifest:full-path="Pictures/1000000000000553000000CC96D8E734CE9DB683.png" manifest:media-type="image/png"/>
  <manifest:file-entry manifest:full-path="Pictures/100000000000054B0000017D8E45B228B5ED3077.png" manifest:media-type="image/png"/>
  <manifest:file-entry manifest:full-path="Pictures/100000000000054B000001CF8D51C975B34A8B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4396in" fo:margin-top="0in" fo:margin-bottom="0in" table:align="left"/>
    </style:style>
    <style:style style:name="Table4.A" style:family="table-column">
      <style:table-column-properties style:column-width="2.3104in"/>
    </style:style>
    <style:style style:name="Table4.B" style:family="table-column">
      <style:table-column-properties style:column-width="1.7521in"/>
    </style:style>
    <style:style style:name="Table4.C" style:family="table-column">
      <style:table-column-properties style:column-width="1.4965in"/>
    </style:style>
    <style:style style:name="Table4.D" style:family="table-column">
      <style:table-column-properties style:column-width="0.8806in"/>
    </style:style>
    <style:style style:name="Table4.1" style:family="table-row">
      <style:table-row-properties style:min-row-height="0.1778in" fo:keep-together="auto"/>
    </style:style>
    <style:style style:name="Table4.A1" style:family="table-cell">
      <style:table-cell-properties style:vertical-align="" fo:padding-left="0.0201in" fo:padding-right="0.0201in" fo:padding-top="0in" fo:padding-bottom="0in" fo:border-left="0.05pt solid #000000" fo:border-right="none" fo:border-top="0.05pt solid #000000" fo:border-bottom="0.05pt solid #000000"/>
    </style:style>
    <style:style style:name="Table4.D1" style:family="table-cell">
      <style:table-cell-properties style:vertical-align="" fo:padding-left="0.0201in" fo:padding-right="0.0201in" fo:padding-top="0in" fo:padding-bottom="0in" fo:border="0.05pt solid #000000"/>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data-style-name="N3">
      <style:table-cell-properties style:vertical-align="bottom" fo:padding-left="0.0201in" fo:padding-right="0.0201in" fo:padding-top="0in" fo:padding-bottom="0in" fo:border-left="0.05pt solid #000000" fo:border-right="none" fo:border-top="none" fo:border-bottom="0.05pt solid #000000"/>
    </style:style>
    <style:style style:name="Table4.D2" style:family="table-cell" style:data-style-name="N3">
      <style:table-cell-properties style:vertical-align="bottom" fo:padding-left="0.0201in" fo:padding-right="0.0201in" fo:padding-top="0in" fo:padding-bottom="0in" fo:border-left="0.05pt solid #000000" fo:border-right="0.05pt solid #000000" fo:border-top="none" fo:border-bottom="0.05pt solid #000000"/>
    </style:style>
    <style:style style:name="Table4.D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1" style:family="table">
      <style:table-properties style:width="6.8701in" style:rel-width="100%" fo:margin-left="0in" fo:margin-top="0in" fo:margin-bottom="0in" table:align="left"/>
    </style:style>
    <style:style style:name="Table11.A" style:family="table-column">
      <style:table-column-properties style:column-width="2.3368in" style:rel-column-width="3279*"/>
    </style:style>
    <style:style style:name="Table11.B" style:family="table-column">
      <style:table-column-properties style:column-width="0.6757in" style:rel-column-width="948*"/>
    </style:style>
    <style:style style:name="Table11.C" style:family="table-column">
      <style:table-column-properties style:column-width="0.7097in" style:rel-column-width="996*"/>
    </style:style>
    <style:style style:name="Table11.D" style:family="table-column">
      <style:table-column-properties style:column-width="0.6417in" style:rel-column-width="900*"/>
    </style:style>
    <style:style style:name="Table11.F" style:family="table-column">
      <style:table-column-properties style:column-width="0.7in" style:rel-column-width="982*"/>
    </style:style>
    <style:style style:name="Table11.G" style:family="table-column">
      <style:table-column-properties style:column-width="0.5708in" style:rel-column-width="801*"/>
    </style:style>
    <style:style style:name="Table11.H" style:family="table-column">
      <style:table-column-properties style:column-width="0.5951in" style:rel-column-width="835*"/>
    </style:style>
    <style:style style:name="Table11.1" style:family="table-row">
      <style:table-row-properties style:min-row-height="0.1778in" fo:keep-together="auto"/>
    </style:style>
    <style:style style:name="Table1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1.H1" style:family="table-cell">
      <style:table-cell-properties style:vertical-align="bottom" fo:padding-left="0.0201in" fo:padding-right="0.0201in" fo:padding-top="0in" fo:padding-bottom="0in" fo:border="0.05pt solid #000000"/>
    </style:style>
    <style:style style:name="Table1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1.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 style:family="table">
      <style:table-properties style:width="6.8701in" style:rel-width="100%" fo:margin-left="0in" fo:margin-top="0in" fo:margin-bottom="0in" table:align="left"/>
    </style:style>
    <style:style style:name="Table10.A" style:family="table-column">
      <style:table-column-properties style:column-width="1.6035in" style:rel-column-width="2250*"/>
    </style:style>
    <style:style style:name="Table10.B" style:family="table-column">
      <style:table-column-properties style:column-width="1.6708in" style:rel-column-width="2345*"/>
    </style:style>
    <style:style style:name="Table10.C" style:family="table-column">
      <style:table-column-properties style:column-width="1.309in" style:rel-column-width="1837*"/>
    </style:style>
    <style:style style:name="Table10.D" style:family="table-column">
      <style:table-column-properties style:column-width="1.1424in" style:rel-column-width="1603*"/>
    </style:style>
    <style:style style:name="Table10.E" style:family="table-column">
      <style:table-column-properties style:column-width="1.1444in" style:rel-column-width="1606*"/>
    </style:style>
    <style:style style:name="Table10.1" style:family="table-row">
      <style:table-row-properties style:min-row-height="0.5153in" fo:keep-together="auto"/>
    </style:style>
    <style:style style:name="Table10.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0.E1" style:family="table-cell">
      <style:table-cell-properties style:vertical-align="bottom" fo:padding-left="0.0201in" fo:padding-right="0.0201in" fo:padding-top="0in" fo:padding-bottom="0in" fo:border="0.05pt solid #000000"/>
    </style:style>
    <style:style style:name="Table10.2" style:family="table-row">
      <style:table-row-properties style:min-row-height="0.1778in" fo:keep-together="auto"/>
    </style:style>
    <style:style style:name="Table10.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8701in" style:rel-width="100%" table:align="left" style:writing-mode="lr-tb"/>
    </style:style>
    <style:style style:name="Table2.A" style:family="table-column">
      <style:table-column-properties style:column-width="3.8403in" style:rel-column-width="5387*"/>
    </style:style>
    <style:style style:name="Table2.B" style:family="table-column">
      <style:table-column-properties style:column-width="1.5153in" style:rel-column-width="2126*"/>
    </style:style>
    <style:style style:name="Table2.C" style:family="table-column">
      <style:table-column-properties style:column-width="1.5146in" style:rel-column-width="2125*"/>
    </style:style>
    <style:style style:name="Table2.1" style:family="table-row">
      <style:table-row-properties style:min-row-height="0.1681in" fo:keep-together="auto"/>
    </style:style>
    <style:style style:name="Table2.A1" style:family="table-cell">
      <style:table-cell-properties style:vertical-align="middle" fo:background-color="transparent" fo:padding-left="0.0194in" fo:padding-right="0.0194in" fo:padding-top="0in" fo:padding-bottom="0in" fo:border-left="0.05pt solid #000000" fo:border-right="none" fo:border-top="0.05pt solid #000000" fo:border-bottom="0.05pt solid #000000">
        <style:background-image/>
      </style:table-cell-properties>
    </style:style>
    <style:style style:name="Table2.B1" style:family="table-cell">
      <style:table-cell-properties style:vertical-align="middle" fo:padding-left="0.0194in" fo:padding-right="0.0194in" fo:padding-top="0in" fo:padding-bottom="0in" fo:border-left="0.05pt solid #000000" fo:border-right="none" fo:border-top="0.05pt solid #000000" fo:border-bottom="0.05pt solid #000000"/>
    </style:style>
    <style:style style:name="Table2.C1" style:family="table-cell">
      <style:table-cell-properties style:vertical-align="middle" fo:padding-left="0.0194in" fo:padding-right="0.0194in" fo:padding-top="0in" fo:padding-bottom="0in" fo:border="0.05pt solid #000000"/>
    </style:style>
    <style:style style:name="Table2.A2"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2"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2"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3"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3"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3"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4"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4"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4"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5"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5"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5"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6"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6"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6"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7"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7"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7"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8"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8"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8"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9"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9"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9"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10"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10"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10"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11"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11"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11"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2.A12"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B12"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2.C12"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5" style:family="table">
      <style:table-properties style:width="6.8701in" style:rel-width="100%" fo:margin-left="0in" table:align="left" style:writing-mode="lr-tb"/>
    </style:style>
    <style:style style:name="Table5.A" style:family="table-column">
      <style:table-column-properties style:column-width="5.2604in" style:rel-column-width="7380*"/>
    </style:style>
    <style:style style:name="Table5.B" style:family="table-column">
      <style:table-column-properties style:column-width="1.6097in" style:rel-column-width="2258*"/>
    </style:style>
    <style:style style:name="Table5.1" style:family="table-row">
      <style:table-row-properties style:min-row-height="0.1792in" fo:keep-together="auto"/>
    </style:style>
    <style:style style:name="Table5.A1" style:family="table-cell">
      <style:table-cell-properties style:vertical-align="middle" fo:padding-left="0.0194in" fo:padding-right="0.0194in" fo:padding-top="0in" fo:padding-bottom="0in" fo:border-left="0.05pt solid #000000" fo:border-right="none" fo:border-top="0.05pt solid #000000" fo:border-bottom="0.05pt solid #000000"/>
    </style:style>
    <style:style style:name="Table5.B1" style:family="table-cell">
      <style:table-cell-properties style:vertical-align="middle" fo:padding-left="0.0194in" fo:padding-right="0.0194in" fo:padding-top="0in" fo:padding-bottom="0in" fo:border="0.05pt solid #000000"/>
    </style:style>
    <style:style style:name="Table5.2" style:family="table-row">
      <style:table-row-properties style:min-row-height="0.2014in" fo:keep-together="auto"/>
    </style:style>
    <style:style style:name="Table5.A2" style:family="table-cell">
      <style:table-cell-properties style:vertical-align="middle" fo:padding-left="0.0194in" fo:padding-right="0.0194in" fo:padding-top="0in" fo:padding-bottom="0in" fo:border-left="0.05pt solid #000000" fo:border-right="none" fo:border-top="none" fo:border-bottom="0.05pt solid #000000"/>
    </style:style>
    <style:style style:name="Table5.B2" style:family="table-cell">
      <style:table-cell-properties style:vertical-align="middle" fo:padding-left="0.0194in" fo:padding-right="0.0194in" fo:padding-top="0in" fo:padding-bottom="0in" fo:border-left="0.05pt solid #000000" fo:border-right="0.05pt solid #000000" fo:border-top="none" fo:border-bottom="0.05pt solid #000000"/>
    </style:style>
    <style:style style:name="Table7" style:family="table">
      <style:table-properties style:width="6.6958in" table:align="left" style:writing-mode="lr-tb"/>
    </style:style>
    <style:style style:name="Table7.A" style:family="table-column">
      <style:table-column-properties style:column-width="6.6958in"/>
    </style:style>
    <style:style style:name="Table7.1" style:family="table-row">
      <style:table-row-properties fo:keep-together="auto"/>
    </style:style>
    <style:style style:name="Table7.A1" style:family="table-cell">
      <style:table-cell-properties style:vertical-align="top" fo:padding="0.0382in" fo:border="0.1pt solid #000000" style:writing-mode="lr-tb"/>
    </style:style>
    <style:style style:name="Table7.A2" style:family="table-cell">
      <style:table-cell-properties style:vertical-align="top" fo:padding="0.0382in" fo:border-left="0.1pt solid #000000" fo:border-right="0.1pt solid #000000" fo:border-top="none" fo:border-bottom="0.1pt solid #000000" style:writing-mode="lr-tb"/>
    </style:style>
    <style:style style:name="Table9" style:family="table">
      <style:table-properties style:width="6.6958in" table:align="left" style:writing-mode="lr-tb"/>
    </style:style>
    <style:style style:name="Table9.A" style:family="table-column">
      <style:table-column-properties style:column-width="6.6958in"/>
    </style:style>
    <style:style style:name="Table9.1" style:family="table-row">
      <style:table-row-properties fo:keep-together="auto"/>
    </style:style>
    <style:style style:name="Table9.A1" style:family="table-cell">
      <style:table-cell-properties style:vertical-align="top" fo:padding="0.0382in" fo:border="0.1pt solid #000000" style:writing-mode="lr-tb"/>
    </style:style>
    <style:style style:name="Table9.A2" style:family="table-cell">
      <style:table-cell-properties style:vertical-align="top" fo:padding="0.0382in" fo:border-left="0.1pt solid #000000" fo:border-right="0.1pt solid #000000" fo:border-top="none" fo:border-bottom="0.1pt solid #000000" style:writing-mode="lr-tb"/>
    </style:style>
    <style:style style:name="Table12" style:family="table">
      <style:table-properties style:width="6.8701in" table:align="margins" style:writing-mode="page"/>
    </style:style>
    <style:style style:name="Table12.A" style:family="table-column">
      <style:table-column-properties style:column-width="6.8701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6" style:family="table">
      <style:table-properties style:width="6.4396in" fo:margin-left="0.3965in" fo:margin-top="0in" fo:margin-bottom="0in" table:align="left"/>
    </style:style>
    <style:style style:name="Table6.A" style:family="table-column">
      <style:table-column-properties style:column-width="3.0021in"/>
    </style:style>
    <style:style style:name="Table6.B" style:family="table-column">
      <style:table-column-properties style:column-width="0.6819in"/>
    </style:style>
    <style:style style:name="Table6.C" style:family="table-column">
      <style:table-column-properties style:column-width="0.625in"/>
    </style:style>
    <style:style style:name="Table6.D" style:family="table-column">
      <style:table-column-properties style:column-width="0.5014in"/>
    </style:style>
    <style:style style:name="Table6.F" style:family="table-column">
      <style:table-column-properties style:column-width="0.5021in"/>
    </style:style>
    <style:style style:name="Table6.1" style:family="table-row">
      <style:table-row-properties style:min-row-height="0.1778in" fo:keep-together="auto"/>
    </style:style>
    <style:style style:name="Table6.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6.G1" style:family="table-cell">
      <style:table-cell-properties style:vertical-align="bottom" fo:padding-left="0.0201in" fo:padding-right="0.0201in" fo:padding-top="0in" fo:padding-bottom="0in" fo:border="0.05pt solid #000000"/>
    </style:style>
    <style:style style:name="Table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 style:family="table">
      <style:table-properties style:width="5.691in" fo:margin-top="0in" fo:margin-bottom="0in" table:align="left"/>
    </style:style>
    <style:style style:name="Table13.A" style:family="table-column">
      <style:table-column-properties style:column-width="2.0646in"/>
    </style:style>
    <style:style style:name="Table13.B" style:family="table-column">
      <style:table-column-properties style:column-width="1.25in"/>
    </style:style>
    <style:style style:name="Table13.C" style:family="table-column">
      <style:table-column-properties style:column-width="1.1833in"/>
    </style:style>
    <style:style style:name="Table13.D" style:family="table-column">
      <style:table-column-properties style:column-width="1.1931in"/>
    </style:style>
    <style:style style:name="Table13.1" style:family="table-row">
      <style:table-row-properties style:min-row-height="0.1778in" fo:keep-together="auto"/>
    </style:style>
    <style:style style:name="Table1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3.D1" style:family="table-cell">
      <style:table-cell-properties style:vertical-align="bottom" fo:padding-left="0.0201in" fo:padding-right="0.0201in" fo:padding-top="0in" fo:padding-bottom="0in" fo:border="0.05pt solid #000000"/>
    </style:style>
    <style:style style:name="Table1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5" style:family="table">
      <style:table-properties style:width="6.8701in" table:align="margins" style:writing-mode="page"/>
    </style:style>
    <style:style style:name="Table15.A" style:family="table-column">
      <style:table-column-properties style:column-width="6.8701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8701in" table:align="margins" style:writing-mode="page"/>
    </style:style>
    <style:style style:name="Table18.A" style:family="table-column">
      <style:table-column-properties style:column-width="6.8701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6" style:family="table">
      <style:table-properties style:width="6.8701in" table:align="margins" style:writing-mode="page"/>
    </style:style>
    <style:style style:name="Table16.A" style:family="table-column">
      <style:table-column-properties style:column-width="6.8701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8701in" table:align="margins" style:writing-mode="page"/>
    </style:style>
    <style:style style:name="Table17.A" style:family="table-column">
      <style:table-column-properties style:column-width="6.8701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6.6958in" table:align="left" style:writing-mode="lr-tb"/>
    </style:style>
    <style:style style:name="Table3.A" style:family="table-column">
      <style:table-column-properties style:column-width="6.6958in"/>
    </style:style>
    <style:style style:name="Table3.1" style:family="table-row">
      <style:table-row-properties fo:keep-together="auto"/>
    </style:style>
    <style:style style:name="Table3.A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ing">
      <style:text-properties fo:font-size="10pt" officeooo:rsid="07cd063f" officeooo:paragraph-rsid="003b5c26" style:font-size-asian="10pt" style:font-size-complex="10pt"/>
    </style:style>
    <style:style style:name="P2" style:family="paragraph" style:parent-style-name="Text_20_body">
      <style:text-properties officeooo:rsid="090da2be" officeooo:paragraph-rsid="0006f097"/>
    </style:style>
    <style:style style:name="P3" style:family="paragraph" style:parent-style-name="Text_20_body">
      <style:text-properties officeooo:rsid="090da2be" officeooo:paragraph-rsid="017c67b9"/>
    </style:style>
    <style:style style:name="P4" style:family="paragraph" style:parent-style-name="Text_20_body">
      <style:text-properties officeooo:rsid="090da2be" officeooo:paragraph-rsid="01b8e164"/>
    </style:style>
    <style:style style:name="P5" style:family="paragraph" style:parent-style-name="Text_20_body">
      <style:text-properties officeooo:paragraph-rsid="0006f097"/>
    </style:style>
    <style:style style:name="P6" style:family="paragraph" style:parent-style-name="Text_20_body">
      <style:paragraph-properties fo:text-align="justify" style:justify-single-word="false"/>
      <style:text-properties fo:font-weight="normal" officeooo:rsid="001b0f2c" officeooo:paragraph-rsid="0010cdce" style:font-weight-asian="normal" style:font-weight-complex="normal"/>
    </style:style>
    <style:style style:name="P7" style:family="paragraph" style:parent-style-name="Text_20_body">
      <style:text-properties fo:font-weight="normal" officeooo:paragraph-rsid="0010cdce" style:font-weight-asian="normal" style:font-weight-complex="normal"/>
    </style:style>
    <style:style style:name="P8" style:family="paragraph" style:parent-style-name="Text_20_body">
      <style:paragraph-properties fo:text-align="justify" style:justify-single-word="false"/>
      <style:text-properties fo:font-weight="normal" officeooo:rsid="001f37d0" officeooo:paragraph-rsid="001f37d0" style:font-weight-asian="normal" style:font-weight-complex="normal"/>
    </style:style>
    <style:style style:name="P9" style:family="paragraph" style:parent-style-name="Text_20_body">
      <style:text-properties fo:font-weight="normal" officeooo:rsid="004ba307" officeooo:paragraph-rsid="004eaae6" style:font-weight-asian="normal" style:font-weight-complex="normal"/>
    </style:style>
    <style:style style:name="P10" style:family="paragraph" style:parent-style-name="Text_20_body">
      <style:text-properties fo:font-weight="normal" officeooo:paragraph-rsid="0121c7fa" style:font-weight-asian="normal" style:font-weight-complex="normal"/>
    </style:style>
    <style:style style:name="P11" style:family="paragraph" style:parent-style-name="Text_20_body">
      <style:text-properties fo:font-weight="normal" officeooo:rsid="0193d6cb" officeooo:paragraph-rsid="0193d6cb" style:font-weight-asian="normal" style:font-weight-complex="normal"/>
    </style:style>
    <style:style style:name="P12" style:family="paragraph" style:parent-style-name="Text_20_body">
      <style:text-properties officeooo:rsid="00164cc0" officeooo:paragraph-rsid="00164cc0"/>
    </style:style>
    <style:style style:name="P13" style:family="paragraph" style:parent-style-name="Text_20_body">
      <style:text-properties officeooo:rsid="00164cc0" officeooo:paragraph-rsid="0196566c"/>
    </style:style>
    <style:style style:name="P14" style:family="paragraph" style:parent-style-name="Text_20_body">
      <style:paragraph-properties fo:text-align="justify" style:justify-single-word="false"/>
      <style:text-properties fo:font-size="12pt" style:text-underline-style="none" fo:font-weight="normal" officeooo:paragraph-rsid="0020980f" style:font-size-asian="12pt" style:font-weight-asian="normal" style:font-size-complex="12pt" style:font-weight-complex="normal"/>
    </style:style>
    <style:style style:name="P15" style:family="paragraph" style:parent-style-name="Text_20_body">
      <style:text-properties officeooo:paragraph-rsid="0020980f"/>
    </style:style>
    <style:style style:name="P16" style:family="paragraph" style:parent-style-name="Text_20_body">
      <style:text-properties officeooo:rsid="0023c90a" officeooo:paragraph-rsid="0023c90a"/>
    </style:style>
    <style:style style:name="P17" style:family="paragraph" style:parent-style-name="Text_20_body">
      <style:text-properties officeooo:rsid="003977eb" officeooo:paragraph-rsid="003977eb"/>
    </style:style>
    <style:style style:name="P18" style:family="paragraph" style:parent-style-name="Text_20_body">
      <style:text-properties officeooo:rsid="00456be3" officeooo:paragraph-rsid="00456be3"/>
    </style:style>
    <style:style style:name="P19" style:family="paragraph" style:parent-style-name="Text_20_body">
      <style:text-properties officeooo:rsid="004b2542" officeooo:paragraph-rsid="004b8320"/>
    </style:style>
    <style:style style:name="P20" style:family="paragraph" style:parent-style-name="Text_20_body">
      <style:text-properties officeooo:rsid="004cfa26" officeooo:paragraph-rsid="004cfa26"/>
    </style:style>
    <style:style style:name="P21" style:family="paragraph" style:parent-style-name="Text_20_body">
      <style:text-properties officeooo:paragraph-rsid="00dacac2"/>
    </style:style>
    <style:style style:name="P22" style:family="paragraph" style:parent-style-name="Text_20_body">
      <style:text-properties officeooo:paragraph-rsid="00f7aea4"/>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officeooo:rsid="0199ba20" officeooo:paragraph-rsid="0198906d" style:font-weight-asian="bold" style:font-weight-complex="bold"/>
    </style:style>
    <style:style style:name="P25" style:family="paragraph" style:parent-style-name="Text_20_body">
      <style:text-properties fo:font-weight="bold" officeooo:paragraph-rsid="0121c7fa" style:font-weight-asian="bold" style:font-weight-complex="bold"/>
    </style:style>
    <style:style style:name="P26" style:family="paragraph" style:parent-style-name="Text_20_body">
      <style:text-properties officeooo:rsid="012c0728" officeooo:paragraph-rsid="0198b314"/>
    </style:style>
    <style:style style:name="P27" style:family="paragraph" style:parent-style-name="Text_20_body">
      <style:text-properties officeooo:paragraph-rsid="017e1d16"/>
    </style:style>
    <style:style style:name="P28" style:family="paragraph" style:parent-style-name="Text_20_body">
      <style:text-properties officeooo:rsid="0008e6b8" officeooo:paragraph-rsid="018118a1"/>
    </style:style>
    <style:style style:name="P29" style:family="paragraph" style:parent-style-name="Text_20_body">
      <style:text-properties officeooo:rsid="0008e6b8" officeooo:paragraph-rsid="01b9ec2e"/>
    </style:style>
    <style:style style:name="P30" style:family="paragraph" style:parent-style-name="Text_20_body">
      <style:text-properties officeooo:rsid="00689ad7" officeooo:paragraph-rsid="01b9ec2e"/>
    </style:style>
    <style:style style:name="P31" style:family="paragraph" style:parent-style-name="Text_20_body">
      <style:text-properties officeooo:rsid="018cb2f2"/>
    </style:style>
    <style:style style:name="P32" style:family="paragraph" style:parent-style-name="Text_20_body">
      <style:paragraph-properties fo:text-align="end" style:justify-single-word="false"/>
    </style:style>
    <style:style style:name="P33" style:family="paragraph" style:parent-style-name="Text_20_body">
      <style:paragraph-properties fo:text-align="end" style:justify-single-word="false"/>
      <style:text-properties officeooo:paragraph-rsid="0196566c"/>
    </style:style>
    <style:style style:name="P34" style:family="paragraph" style:parent-style-name="Text_20_body">
      <style:text-properties officeooo:rsid="01958b18" officeooo:paragraph-rsid="01958b18"/>
    </style:style>
    <style:style style:name="P35" style:family="paragraph" style:parent-style-name="Text_20_body">
      <style:text-properties officeooo:paragraph-rsid="0196566c"/>
    </style:style>
    <style:style style:name="P36" style:family="paragraph" style:parent-style-name="Text_20_body">
      <style:text-properties officeooo:rsid="0196566c" officeooo:paragraph-rsid="0196566c"/>
    </style:style>
    <style:style style:name="P37" style:family="paragraph" style:parent-style-name="Text_20_body">
      <style:paragraph-properties fo:text-align="end" style:justify-single-word="false"/>
      <style:text-properties officeooo:rsid="0196566c" officeooo:paragraph-rsid="0196566c"/>
    </style:style>
    <style:style style:name="P38" style:family="paragraph" style:parent-style-name="Text_20_body">
      <style:text-properties officeooo:rsid="0196566c" officeooo:paragraph-rsid="01aa5453"/>
    </style:style>
    <style:style style:name="P39" style:family="paragraph" style:parent-style-name="Text_20_body">
      <style:paragraph-properties fo:text-align="justify" style:justify-single-word="false"/>
      <style:text-properties officeooo:paragraph-rsid="00c3d4c4"/>
    </style:style>
    <style:style style:name="P40" style:family="paragraph" style:parent-style-name="Text_20_body">
      <style:text-properties officeooo:rsid="0198906d"/>
    </style:style>
    <style:style style:name="P41" style:family="paragraph" style:parent-style-name="Text_20_body">
      <style:paragraph-properties fo:text-align="justify" style:justify-single-word="false"/>
      <style:text-properties officeooo:rsid="0198906d" officeooo:paragraph-rsid="0198906d"/>
    </style:style>
    <style:style style:name="P42" style:family="paragraph" style:parent-style-name="Text_20_body">
      <style:text-properties officeooo:rsid="0198906d" officeooo:paragraph-rsid="0198906d"/>
    </style:style>
    <style:style style:name="P43" style:family="paragraph" style:parent-style-name="Text_20_body">
      <style:text-properties style:text-underline-style="none" fo:font-weight="bold" style:font-weight-asian="bold" style:font-weight-complex="bold"/>
    </style:style>
    <style:style style:name="P44" style:family="paragraph" style:parent-style-name="Text_20_body">
      <style:text-properties officeooo:rsid="01857a57" officeooo:paragraph-rsid="0196566c"/>
    </style:style>
    <style:style style:name="P45" style:family="paragraph" style:parent-style-name="Text_20_body">
      <style:text-properties officeooo:rsid="01a117c8" officeooo:paragraph-rsid="01a117c8"/>
    </style:style>
    <style:style style:name="P46" style:family="paragraph" style:parent-style-name="Text_20_body">
      <style:text-properties officeooo:paragraph-rsid="01a117c8"/>
    </style:style>
    <style:style style:name="P47" style:family="paragraph" style:parent-style-name="Text_20_body">
      <style:text-properties officeooo:paragraph-rsid="019e389e"/>
    </style:style>
    <style:style style:name="P48" style:family="paragraph" style:parent-style-name="Text_20_body">
      <style:text-properties officeooo:paragraph-rsid="0199adb5"/>
    </style:style>
    <style:style style:name="P49" style:family="paragraph" style:parent-style-name="Text_20_body">
      <style:text-properties officeooo:paragraph-rsid="01af4c88"/>
    </style:style>
    <style:style style:name="P50" style:family="paragraph" style:parent-style-name="Text_20_body">
      <style:text-properties officeooo:rsid="003291fa" officeooo:paragraph-rsid="01af9c54"/>
    </style:style>
    <style:style style:name="P51" style:family="paragraph" style:parent-style-name="Text_20_body">
      <style:text-properties officeooo:rsid="003471b3" officeooo:paragraph-rsid="003471b3"/>
    </style:style>
    <style:style style:name="P52" style:family="paragraph" style:parent-style-name="Text_20_body">
      <style:text-properties officeooo:rsid="01b414ce" officeooo:paragraph-rsid="01b414ce"/>
    </style:style>
    <style:style style:name="P53" style:family="paragraph" style:parent-style-name="Text_20_body">
      <style:text-properties officeooo:rsid="01b414ce" officeooo:paragraph-rsid="01b5423d"/>
    </style:style>
    <style:style style:name="P54" style:family="paragraph" style:parent-style-name="Text_20_body">
      <style:text-properties officeooo:rsid="01a2d4ac" officeooo:paragraph-rsid="01b414ce"/>
    </style:style>
    <style:style style:name="P55" style:family="paragraph" style:parent-style-name="Text_20_body">
      <style:text-properties officeooo:rsid="01825c79" officeooo:paragraph-rsid="01b9ec2e"/>
    </style:style>
    <style:style style:name="P56" style:family="paragraph" style:parent-style-name="Text_20_body">
      <style:text-properties officeooo:rsid="01af4c88" officeooo:paragraph-rsid="01af4c88"/>
    </style:style>
    <style:style style:name="P57" style:family="paragraph" style:parent-style-name="Text_20_body">
      <style:text-properties officeooo:rsid="090f2ae8" officeooo:paragraph-rsid="017c67b9"/>
    </style:style>
    <style:style style:name="P58" style:family="paragraph" style:parent-style-name="Text_20_body">
      <style:text-properties officeooo:rsid="090f2ae8" officeooo:paragraph-rsid="01b8e164"/>
    </style:style>
    <style:style style:name="P59" style:family="paragraph" style:parent-style-name="Text_20_body">
      <style:text-properties officeooo:rsid="001f583f" officeooo:paragraph-rsid="01bc2d35"/>
    </style:style>
    <style:style style:name="P60" style:family="paragraph" style:parent-style-name="Text_20_body">
      <style:text-properties officeooo:paragraph-rsid="01bc2d35"/>
    </style:style>
    <style:style style:name="P61" style:family="paragraph" style:parent-style-name="Text_20_body">
      <style:text-properties officeooo:paragraph-rsid="01bd9f19"/>
    </style:style>
    <style:style style:name="P62" style:family="paragraph" style:parent-style-name="Text_20_body">
      <style:text-properties officeooo:paragraph-rsid="01c0fd28"/>
    </style:style>
    <style:style style:name="P63" style:family="paragraph" style:parent-style-name="Text_20_body">
      <style:text-properties officeooo:rsid="01bb73ac" officeooo:paragraph-rsid="01c0fd28"/>
    </style:style>
    <style:style style:name="P64" style:family="paragraph" style:parent-style-name="Text_20_body">
      <style:text-properties officeooo:rsid="090cdd4e" officeooo:paragraph-rsid="01c7f23a"/>
    </style:style>
    <style:style style:name="P65" style:family="paragraph" style:parent-style-name="Text_20_body">
      <style:paragraph-properties style:writing-mode="lr-tb"/>
      <style:text-properties style:text-underline-style="solid" style:text-underline-width="auto" style:text-underline-color="font-color" fo:font-weight="bold" officeooo:rsid="05ed3192" officeooo:paragraph-rsid="0006f097" style:font-weight-asian="bold" style:font-weight-complex="bold"/>
    </style:style>
    <style:style style:name="P66" style:family="paragraph" style:parent-style-name="Text_20_body">
      <style:paragraph-properties style:writing-mode="lr-tb"/>
      <style:text-properties officeooo:paragraph-rsid="0006f097"/>
    </style:style>
    <style:style style:name="P67" style:family="paragraph" style:parent-style-name="Standard">
      <style:paragraph-properties fo:text-align="end" style:justify-single-word="false">
        <style:tab-stops/>
      </style:paragraph-properties>
      <style:text-properties fo:font-weight="bold" style:font-weight-asian="bold"/>
    </style:style>
    <style:style style:name="P68" style:family="paragraph" style:parent-style-name="Standard">
      <style:text-properties fo:font-weight="bold" officeooo:rsid="00ae30eb" officeooo:paragraph-rsid="0196566c" style:font-weight-asian="bold" style:font-weight-complex="bold"/>
    </style:style>
    <style:style style:name="P69" style:family="paragraph" style:parent-style-name="Standard">
      <style:paragraph-properties fo:text-align="end" style:justify-single-word="false">
        <style:tab-stops/>
      </style:paragraph-properties>
    </style:style>
    <style:style style:name="P70" style:family="paragraph" style:parent-style-name="Standard">
      <style:text-properties officeooo:paragraph-rsid="002f7a3b"/>
    </style:style>
    <style:style style:name="P71" style:family="paragraph" style:parent-style-name="Standard">
      <style:text-properties officeooo:rsid="011c768e" officeooo:paragraph-rsid="011c768e"/>
    </style:style>
    <style:style style:name="P72" style:family="paragraph" style:parent-style-name="Standard">
      <style:paragraph-properties fo:text-align="start" style:justify-single-word="false">
        <style:tab-stops/>
      </style:paragraph-properties>
      <style:text-properties officeooo:rsid="0190da5b" officeooo:paragraph-rsid="0190da5b"/>
    </style:style>
    <style:style style:name="P73" style:family="paragraph" style:parent-style-name="Standard">
      <style:text-properties officeooo:rsid="0190da5b" officeooo:paragraph-rsid="0196566c"/>
    </style:style>
    <style:style style:name="P74" style:family="paragraph" style:parent-style-name="Standard">
      <style:paragraph-properties fo:text-align="end" style:justify-single-word="false">
        <style:tab-stops/>
      </style:paragraph-properties>
      <style:text-properties officeooo:rsid="01958b18" officeooo:paragraph-rsid="01958b18"/>
    </style:style>
    <style:style style:name="P75" style:family="paragraph" style:parent-style-name="Standard">
      <style:paragraph-properties fo:text-align="end" style:justify-single-word="false">
        <style:tab-stops/>
      </style:paragraph-properties>
      <style:text-properties officeooo:rsid="0193d6cb"/>
    </style:style>
    <style:style style:name="P76" style:family="paragraph" style:parent-style-name="Footnote">
      <style:text-properties officeooo:rsid="0daa69c6" officeooo:paragraph-rsid="0daa69c6"/>
    </style:style>
    <style:style style:name="P77" style:family="paragraph" style:parent-style-name="Footnote">
      <style:text-properties officeooo:rsid="07a4ae60" officeooo:paragraph-rsid="07a4ae60"/>
    </style:style>
    <style:style style:name="P78" style:family="paragraph" style:parent-style-name="Footnote">
      <style:text-properties officeooo:rsid="090cdd4e" officeooo:paragraph-rsid="090cdd4e"/>
    </style:style>
    <style:style style:name="P79" style:family="paragraph" style:parent-style-name="Footnote">
      <style:text-properties fo:font-size="10pt" officeooo:paragraph-rsid="008b2474" style:font-size-asian="10pt" style:font-size-complex="10pt"/>
    </style:style>
    <style:style style:name="P80" style:family="paragraph" style:parent-style-name="Footnote">
      <style:text-properties officeooo:rsid="00230ed3" officeooo:paragraph-rsid="00230ed3"/>
    </style:style>
    <style:style style:name="P81" style:family="paragraph" style:parent-style-name="Footnote">
      <style:text-properties officeooo:rsid="0045b6e9" officeooo:paragraph-rsid="0045b6e9"/>
    </style:style>
    <style:style style:name="P82" style:family="paragraph" style:parent-style-name="Footnote">
      <style:text-properties officeooo:rsid="004b8320" officeooo:paragraph-rsid="004b8320"/>
    </style:style>
    <style:style style:name="P83" style:family="paragraph" style:parent-style-name="Footnote">
      <style:text-properties officeooo:rsid="00bf6a08" officeooo:paragraph-rsid="00bf6a08"/>
    </style:style>
    <style:style style:name="P84" style:family="paragraph" style:parent-style-name="Footnote">
      <style:text-properties officeooo:rsid="00a0df8e" officeooo:paragraph-rsid="00a0df8e"/>
    </style:style>
    <style:style style:name="P85" style:family="paragraph" style:parent-style-name="Footnote">
      <style:text-properties officeooo:rsid="090f2ae8" officeooo:paragraph-rsid="090f2ae8"/>
    </style:style>
    <style:style style:name="P86" style:family="paragraph" style:parent-style-name="Footnote">
      <style:text-properties officeooo:rsid="01958b18" officeooo:paragraph-rsid="01a6137e"/>
    </style:style>
    <style:style style:name="P87" style:family="paragraph" style:parent-style-name="Footnote">
      <style:text-properties officeooo:paragraph-rsid="01a6137e"/>
    </style:style>
    <style:style style:name="P88" style:family="paragraph" style:parent-style-name="Footnote">
      <style:text-properties fo:font-weight="bold" officeooo:paragraph-rsid="01a6137e" style:font-weight-asian="bold" style:font-weight-complex="bold"/>
    </style:style>
    <style:style style:name="P89" style:family="paragraph" style:parent-style-name="Footnote">
      <style:text-properties fo:font-weight="bold" officeooo:rsid="0023c90a" officeooo:paragraph-rsid="01a6137e" style:font-weight-asian="bold" style:font-weight-complex="bold"/>
    </style:style>
    <style:style style:name="P90" style:family="paragraph" style:parent-style-name="Footnote">
      <style:text-properties officeooo:rsid="00604089" officeooo:paragraph-rsid="00604089"/>
    </style:style>
    <style:style style:name="P91" style:family="paragraph" style:parent-style-name="Footnote">
      <style:text-properties officeooo:rsid="01bcdc13" officeooo:paragraph-rsid="01bcdc13"/>
    </style:style>
    <style:style style:name="P92" style:family="paragraph" style:parent-style-name="Table_20_Contents">
      <style:paragraph-properties style:snap-to-layout-grid="false"/>
      <style:text-properties officeooo:paragraph-rsid="0023c90a"/>
    </style:style>
    <style:style style:name="P93" style:family="paragraph" style:parent-style-name="Table_20_Contents">
      <style:paragraph-properties style:snap-to-layout-grid="false"/>
      <style:text-properties officeooo:paragraph-rsid="002f7a3b"/>
    </style:style>
    <style:style style:name="P94" style:family="paragraph" style:parent-style-name="Table_20_Contents">
      <style:text-properties style:font-name="Nimbus Roman No9 L" style:font-size-asian="10.5pt"/>
    </style:style>
    <style:style style:name="P95" style:family="paragraph" style:parent-style-name="Table_20_Contents">
      <style:text-properties style:font-name="Nimbus Roman No9 L" officeooo:rsid="01b30b2f" officeooo:paragraph-rsid="01b30b2f" style:font-size-asian="10.5pt"/>
    </style:style>
    <style:style style:name="P96" style:family="paragraph" style:parent-style-name="Table_20_Contents">
      <style:paragraph-properties>
        <style:tab-stops>
          <style:tab-stop style:position="4.4134in"/>
        </style:tab-stops>
      </style:paragraph-properties>
      <style:text-properties style:font-name="Nimbus Roman No9 L" style:font-size-asian="10.5pt"/>
    </style:style>
    <style:style style:name="P97" style:family="paragraph" style:parent-style-name="Table_20_Contents">
      <style:paragraph-properties fo:margin-top="0in" fo:margin-bottom="0in" loext:contextual-spacing="true" fo:line-height="150%"/>
      <style:text-properties officeooo:rsid="01b377f9" officeooo:paragraph-rsid="01b377f9"/>
    </style:style>
    <style:style style:name="P98" style:family="paragraph" style:parent-style-name="Contents_20_2">
      <style:paragraph-properties>
        <style:tab-stops>
          <style:tab-stop style:position="6.6929in" style:type="right" style:leader-style="dotted" style:leader-text="."/>
        </style:tab-stops>
      </style:paragraph-properties>
    </style:style>
    <style:style style:name="P99" style:family="paragraph" style:parent-style-name="Contents_20_4">
      <style:paragraph-properties>
        <style:tab-stops>
          <style:tab-stop style:position="6.6929in" style:type="right" style:leader-style="dotted" style:leader-text="."/>
        </style:tab-stops>
      </style:paragraph-properties>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Contents_20_3">
      <style:paragraph-properties>
        <style:tab-stops>
          <style:tab-stop style:position="6.6929in" style:type="right" style:leader-style="dotted" style:leader-text="."/>
        </style:tab-stops>
      </style:paragraph-properties>
    </style:style>
    <style:style style:name="P102" style:family="paragraph" style:parent-style-name="Text_20_body" style:list-style-name="L1">
      <style:text-properties officeooo:rsid="01825c79" officeooo:paragraph-rsid="01825c79"/>
    </style:style>
    <style:style style:name="P103" style:family="paragraph" style:parent-style-name="Text_20_body" style:list-style-name="L1">
      <style:text-properties officeooo:rsid="0008e6b8" officeooo:paragraph-rsid="01825c79"/>
    </style:style>
    <style:style style:name="P104" style:family="paragraph" style:parent-style-name="Text_20_body" style:list-style-name="L1">
      <style:text-properties officeooo:rsid="0008e6b8" officeooo:paragraph-rsid="018118a1"/>
    </style:style>
    <style:style style:name="P105" style:family="paragraph" style:parent-style-name="Text_20_body" style:list-style-name="L1">
      <style:text-properties officeooo:rsid="001d0385" officeooo:paragraph-rsid="01825c79"/>
    </style:style>
    <style:style style:name="P106" style:family="paragraph" style:parent-style-name="Text_20_body" style:list-style-name="L2">
      <style:text-properties officeooo:rsid="00164cc0" officeooo:paragraph-rsid="0104553d"/>
    </style:style>
    <style:style style:name="P107" style:family="paragraph" style:parent-style-name="Text_20_body" style:list-style-name="L2">
      <style:text-properties officeooo:rsid="00164cc0" officeooo:paragraph-rsid="00164cc0"/>
    </style:style>
    <style:style style:name="P108" style:family="paragraph" style:parent-style-name="Text_20_body" style:list-style-name="L3">
      <style:text-properties officeooo:rsid="01a940d9" officeooo:paragraph-rsid="01a940d9"/>
    </style:style>
    <style:style style:name="P109" style:family="paragraph" style:parent-style-name="Text_20_body" style:list-style-name="L3">
      <style:text-properties officeooo:rsid="00a68018" officeooo:paragraph-rsid="00a68018"/>
    </style:style>
    <style:style style:name="P110" style:family="paragraph" style:parent-style-name="Text_20_body" style:list-style-name="L3">
      <style:text-properties officeooo:rsid="00a68018" officeooo:paragraph-rsid="01a940d9"/>
    </style:style>
    <style:style style:name="P111" style:family="paragraph" style:parent-style-name="Text_20_body" style:list-style-name="L4">
      <style:text-properties fo:font-weight="normal" officeooo:rsid="0193d6cb" officeooo:paragraph-rsid="0193d6cb" style:font-weight-asian="normal" style:font-weight-complex="normal"/>
    </style:style>
    <style:style style:name="P112" style:family="paragraph" style:parent-style-name="Text_20_body" style:list-style-name="L4">
      <style:text-properties fo:font-weight="normal" officeooo:rsid="0196566c" officeooo:paragraph-rsid="0196566c" style:font-weight-asian="normal" style:font-weight-complex="normal"/>
    </style:style>
    <style:style style:name="P113" style:family="paragraph" style:parent-style-name="Text_20_body" style:list-style-name="L4">
      <style:text-properties fo:font-weight="normal" officeooo:rsid="0196566c" officeooo:paragraph-rsid="0197089e" style:font-weight-asian="normal" style:font-weight-complex="normal"/>
    </style:style>
    <style:style style:name="P114" style:family="paragraph" style:parent-style-name="Text_20_body" style:list-style-name="L5"/>
    <style:style style:name="P115" style:family="paragraph" style:parent-style-name="Text_20_body" style:list-style-name="L5">
      <style:text-properties officeooo:paragraph-rsid="019b2fed"/>
    </style:style>
    <style:style style:name="P116" style:family="paragraph" style:parent-style-name="Text_20_body" style:list-style-name="L5">
      <style:text-properties officeooo:paragraph-rsid="0198b314"/>
    </style:style>
    <style:style style:name="P117" style:family="paragraph" style:parent-style-name="Text_20_body" style:list-style-name="L5">
      <style:text-properties style:text-underline-style="none" fo:font-weight="bold" officeooo:paragraph-rsid="0199ba20" style:font-weight-asian="bold" style:font-weight-complex="bold"/>
    </style:style>
    <style:style style:name="P118" style:family="paragraph" style:parent-style-name="Text_20_body" style:list-style-name="L6">
      <style:text-properties officeooo:rsid="01af4c88" officeooo:paragraph-rsid="01af4c88"/>
    </style:style>
    <style:style style:name="P119" style:family="paragraph" style:parent-style-name="Text_20_body" style:list-style-name="L7">
      <style:text-properties officeooo:rsid="00513d03" officeooo:paragraph-rsid="00513d03"/>
    </style:style>
    <style:style style:name="P120" style:family="paragraph" style:parent-style-name="Text_20_body" style:list-style-name="L7">
      <style:text-properties officeooo:rsid="01b414ce" officeooo:paragraph-rsid="01b414ce"/>
    </style:style>
    <style:style style:name="P121" style:family="paragraph" style:parent-style-name="Text_20_body" style:list-style-name="L7">
      <style:text-properties officeooo:rsid="00542e3a" officeooo:paragraph-rsid="00542e3a"/>
    </style:style>
    <style:style style:name="P122" style:family="paragraph" style:parent-style-name="Heading_20_4">
      <style:text-properties officeooo:rsid="00cb92a9"/>
    </style:style>
    <style:style style:name="P123" style:family="paragraph" style:parent-style-name="Heading_20_4">
      <style:paragraph-properties fo:text-align="justify" style:justify-single-word="false"/>
      <style:text-properties fo:font-weight="normal" officeooo:paragraph-rsid="0197089e" style:font-weight-asian="normal" style:font-weight-complex="normal"/>
    </style:style>
    <style:style style:name="P124" style:family="paragraph" style:parent-style-name="Heading_20_4">
      <style:text-properties officeooo:rsid="0020980f" officeooo:paragraph-rsid="0020980f"/>
    </style:style>
    <style:style style:name="P125" style:family="paragraph" style:parent-style-name="Heading_20_4">
      <style:text-properties officeooo:paragraph-rsid="0030a9d3"/>
    </style:style>
    <style:style style:name="P126" style:family="paragraph" style:parent-style-name="Heading_20_1">
      <style:text-properties officeooo:paragraph-rsid="0006f097"/>
    </style:style>
    <style:style style:name="P127" style:family="paragraph" style:parent-style-name="Heading_20_1">
      <style:text-properties officeooo:rsid="00164cc0" officeooo:paragraph-rsid="00164cc0"/>
    </style:style>
    <style:style style:name="P128" style:family="paragraph" style:parent-style-name="Heading_20_1">
      <style:text-properties officeooo:rsid="000bf8dc" officeooo:paragraph-rsid="000bf8dc"/>
    </style:style>
    <style:style style:name="P129" style:family="paragraph" style:parent-style-name="Heading_20_1">
      <style:text-properties officeooo:paragraph-rsid="00513d03"/>
    </style:style>
    <style:style style:name="P130" style:family="paragraph" style:parent-style-name="Heading" style:master-page-name="First_20_Page">
      <style:paragraph-properties style:page-number="auto"/>
      <style:text-properties officeooo:rsid="07cd063f" officeooo:paragraph-rsid="0006f097"/>
    </style:style>
    <style:style style:name="P131" style:family="paragraph" style:parent-style-name="Heading_20_2">
      <style:text-properties officeooo:paragraph-rsid="0006f097"/>
    </style:style>
    <style:style style:name="P132" style:family="paragraph" style:parent-style-name="Heading_20_2">
      <style:text-properties officeooo:rsid="01aa5453" officeooo:paragraph-rsid="01aa5453"/>
    </style:style>
    <style:style style:name="P133" style:family="paragraph" style:parent-style-name="Heading_20_2">
      <style:text-properties officeooo:rsid="0183e0df" officeooo:paragraph-rsid="0183e0df"/>
    </style:style>
    <style:style style:name="P134" style:family="paragraph" style:parent-style-name="Heading_20_2">
      <style:text-properties officeooo:rsid="0030a9d3" officeooo:paragraph-rsid="0030a9d3"/>
    </style:style>
    <style:style style:name="P135" style:family="paragraph" style:parent-style-name="Heading_20_3">
      <style:text-properties officeooo:rsid="017c67b9" officeooo:paragraph-rsid="017c67b9"/>
    </style:style>
    <style:style style:name="P136" style:family="paragraph" style:parent-style-name="Heading_20_3">
      <style:text-properties officeooo:paragraph-rsid="0030a9d3"/>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8" style:family="paragraph">
      <loext:graphic-properties draw:fill-color="#66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9" style:family="paragraph">
      <loext:graphic-properties draw:fill-color="#66ffff"/>
    </style:style>
    <style:style style:name="P140" style:family="paragraph">
      <style:paragraph-properties fo:text-align="center"/>
    </style:style>
    <style:style style:name="P141" style:family="paragraph">
      <loext:graphic-properties draw:fill-color="#ff9900"/>
    </style:style>
    <style:style style:name="P142" style:family="paragraph">
      <loext:graphic-properties draw:fill-color="#ff6600"/>
    </style:style>
    <style:style style:name="T1" style:family="text">
      <style:text-properties officeooo:rsid="003b5c26"/>
    </style:style>
    <style:style style:name="T2" style:family="text">
      <style:text-properties style:font-name="Nimbus Roman No9 L1" fo:font-weight="normal" officeooo:rsid="001ae0f5" style:font-weight-asian="normal" style:font-weight-complex="normal"/>
    </style:style>
    <style:style style:name="T3" style:family="text">
      <style:text-properties style:font-name="Nimbus Roman No9 L1" officeooo:rsid="00707bc1"/>
    </style:style>
    <style:style style:name="T4" style:family="text">
      <style:text-properties style:font-name="Nimbus Roman No9 L1" officeooo:rsid="089e6ac6"/>
    </style:style>
    <style:style style:name="T5" style:family="text">
      <style:text-properties style:font-name="Nimbus Roman No9 L1" officeooo:rsid="08e55674"/>
    </style:style>
    <style:style style:name="T6" style:family="text">
      <style:text-properties style:font-name="Nimbus Roman No9 L1" officeooo:rsid="08acd0c4"/>
    </style:style>
    <style:style style:name="T7" style:family="text">
      <style:text-properties style:font-name="Nimbus Roman No9 L1" officeooo:rsid="0b4402d5"/>
    </style:style>
    <style:style style:name="T8" style:family="text">
      <style:text-properties style:font-name="Nimbus Roman No9 L1" officeooo:rsid="00724408"/>
    </style:style>
    <style:style style:name="T9" style:family="text">
      <style:text-properties style:font-name="Nimbus Roman No9 L1" officeooo:rsid="026a76d9"/>
    </style:style>
    <style:style style:name="T10" style:family="text">
      <style:text-properties style:font-name="Nimbus Roman No9 L1" officeooo:rsid="018d0293"/>
    </style:style>
    <style:style style:name="T11" style:family="text">
      <style:text-properties style:font-name="Nimbus Roman No9 L1" officeooo:rsid="026955ea" fo:background-color="transparent" loext:char-shading-value="0"/>
    </style:style>
    <style:style style:name="T12" style:family="text">
      <style:text-properties style:font-name="Nimbus Roman No9 L1" officeooo:rsid="0b41c3e4" fo:background-color="transparent" loext:char-shading-value="0"/>
    </style:style>
    <style:style style:name="T13" style:family="text">
      <style:text-properties style:font-name="Nimbus Roman No9 L1" officeooo:rsid="090b8a07" fo:background-color="transparent" loext:char-shading-value="0"/>
    </style:style>
    <style:style style:name="T14" style:family="text">
      <style:text-properties style:font-name="Nimbus Roman No9 L1" officeooo:rsid="018d0293" fo:background-color="transparent" loext:char-shading-value="0"/>
    </style:style>
    <style:style style:name="T15" style:family="text">
      <style:text-properties style:font-name="Nimbus Roman No9 L1" officeooo:rsid="00d14146" fo:background-color="transparent" loext:char-shading-value="0"/>
    </style:style>
    <style:style style:name="T16" style:family="text">
      <style:text-properties style:font-name="Nimbus Roman No9 L1" officeooo:rsid="017820ed" fo:background-color="transparent" loext:char-shading-value="0"/>
    </style:style>
    <style:style style:name="T17" style:family="text">
      <style:text-properties style:font-name="Nimbus Roman No9 L1" officeooo:rsid="017c67b9" fo:background-color="transparent" loext:char-shading-value="0"/>
    </style:style>
    <style:style style:name="T18" style:family="text">
      <style:text-properties style:font-name="Nimbus Roman No9 L1" officeooo:rsid="017f7b6b" fo:background-color="transparent" loext:char-shading-value="0"/>
    </style:style>
    <style:style style:name="T19" style:family="text">
      <style:text-properties style:font-name="Nimbus Roman No9 L1" officeooo:rsid="017ac02f"/>
    </style:style>
    <style:style style:name="T20" style:family="text">
      <style:text-properties fo:font-weight="normal" style:font-weight-asian="normal" style:font-weight-complex="normal"/>
    </style:style>
    <style:style style:name="T21" style:family="text">
      <style:text-properties fo:font-weight="normal" officeooo:rsid="0910fa18" style:font-weight-asian="normal" style:font-weight-complex="normal"/>
    </style:style>
    <style:style style:name="T22" style:family="text">
      <style:text-properties fo:font-weight="normal" officeooo:rsid="002ba39e" style:font-weight-asian="normal" style:font-weight-complex="normal"/>
    </style:style>
    <style:style style:name="T23" style:family="text">
      <style:text-properties fo:font-weight="normal" officeooo:rsid="002d0c7f" style:font-weight-asian="normal" style:font-weight-complex="normal"/>
    </style:style>
    <style:style style:name="T24" style:family="text">
      <style:text-properties fo:font-weight="normal" officeooo:rsid="008b2474" style:font-weight-asian="normal" style:font-weight-complex="normal"/>
    </style:style>
    <style:style style:name="T25" style:family="text">
      <style:text-properties fo:font-weight="normal" officeooo:rsid="008c19d3" style:font-weight-asian="normal" style:font-weight-complex="normal"/>
    </style:style>
    <style:style style:name="T26" style:family="text">
      <style:text-properties fo:font-weight="normal" officeooo:rsid="00258682" style:font-weight-asian="normal" style:font-weight-complex="normal"/>
    </style:style>
    <style:style style:name="T27" style:family="text">
      <style:text-properties fo:font-weight="normal" officeooo:rsid="00400c83" style:font-weight-asian="normal" style:font-weight-complex="normal"/>
    </style:style>
    <style:style style:name="T28" style:family="text">
      <style:text-properties fo:font-weight="normal" officeooo:rsid="0046ed48" style:font-weight-asian="normal" style:font-weight-complex="normal"/>
    </style:style>
    <style:style style:name="T29" style:family="text">
      <style:text-properties fo:font-weight="normal" officeooo:rsid="004b8320" style:font-weight-asian="normal" style:font-weight-complex="normal"/>
    </style:style>
    <style:style style:name="T30" style:family="text">
      <style:text-properties fo:font-weight="normal" officeooo:rsid="004ba307" style:font-weight-asian="normal" style:font-weight-complex="normal"/>
    </style:style>
    <style:style style:name="T31" style:family="text">
      <style:text-properties fo:font-weight="normal" officeooo:rsid="004cfa26" style:font-weight-asian="normal" style:font-weight-complex="normal"/>
    </style:style>
    <style:style style:name="T32" style:family="text">
      <style:text-properties fo:font-weight="normal" officeooo:rsid="001f37d0" style:font-weight-asian="normal" style:font-weight-complex="normal"/>
    </style:style>
    <style:style style:name="T33" style:family="text">
      <style:text-properties fo:font-weight="normal" officeooo:rsid="001b0f2c" style:font-weight-asian="normal" style:font-weight-complex="normal"/>
    </style:style>
    <style:style style:name="T34" style:family="text">
      <style:text-properties fo:font-weight="normal" officeooo:rsid="00c78f96" style:font-weight-asian="normal" style:font-weight-complex="normal"/>
    </style:style>
    <style:style style:name="T35" style:family="text">
      <style:text-properties fo:font-weight="normal" officeooo:rsid="00ef9c11" style:font-weight-asian="normal" style:font-weight-complex="normal"/>
    </style:style>
    <style:style style:name="T36" style:family="text">
      <style:text-properties fo:font-weight="normal" officeooo:rsid="010bfd67" style:font-weight-asian="normal" style:font-weight-complex="normal"/>
    </style:style>
    <style:style style:name="T37" style:family="text">
      <style:text-properties fo:font-weight="normal" officeooo:rsid="015d4303" style:font-weight-asian="normal" style:font-weight-complex="normal"/>
    </style:style>
    <style:style style:name="T38" style:family="text">
      <style:text-properties fo:font-weight="normal" officeooo:rsid="01607534" style:font-weight-asian="normal" style:font-weight-complex="normal"/>
    </style:style>
    <style:style style:name="T39" style:family="text">
      <style:text-properties fo:font-weight="normal" officeooo:rsid="017e1d16" style:font-weight-asian="normal" style:font-weight-complex="normal"/>
    </style:style>
    <style:style style:name="T40" style:family="text">
      <style:text-properties fo:font-weight="normal" officeooo:rsid="0189045e" style:font-weight-asian="normal" style:font-weight-complex="normal"/>
    </style:style>
    <style:style style:name="T41" style:family="text">
      <style:text-properties fo:font-weight="normal" officeooo:rsid="018ad052" style:font-weight-asian="normal" style:font-weight-complex="normal"/>
    </style:style>
    <style:style style:name="T42" style:family="text">
      <style:text-properties fo:font-weight="normal" officeooo:rsid="01a940d9" style:font-weight-asian="normal" style:font-weight-complex="normal"/>
    </style:style>
    <style:style style:name="T43" style:family="text">
      <style:text-properties fo:font-weight="normal" officeooo:rsid="01ab2fd8" style:font-weight-asian="normal" style:font-weight-complex="normal"/>
    </style:style>
    <style:style style:name="T44" style:family="text">
      <style:text-properties fo:font-weight="normal" officeooo:rsid="01b8e164" style:font-weight-asian="normal" style:font-weight-complex="normal"/>
    </style:style>
    <style:style style:name="T45" style:family="text">
      <style:text-properties fo:font-weight="normal" officeooo:rsid="01c01014" style:font-weight-asian="normal" style:font-weight-complex="normal"/>
    </style:style>
    <style:style style:name="T46" style:family="text">
      <style:text-properties fo:font-weight="normal" officeooo:rsid="01c7f23a" style:font-weight-asian="normal" style:font-weight-complex="normal"/>
    </style:style>
    <style:style style:name="T47" style:family="text">
      <style:text-properties officeooo:rsid="01b5755d"/>
    </style:style>
    <style:style style:name="T48" style:family="text">
      <style:text-properties officeooo:rsid="05fa7a10"/>
    </style:style>
    <style:style style:name="T49" style:family="text">
      <style:text-properties officeooo:rsid="07cf37ab"/>
    </style:style>
    <style:style style:name="T50" style:family="text">
      <style:text-properties officeooo:rsid="07d0f0a7"/>
    </style:style>
    <style:style style:name="T51" style:family="text">
      <style:text-properties fo:font-style="normal" style:font-style-asian="normal" style:font-style-complex="normal"/>
    </style:style>
    <style:style style:name="T52" style:family="text">
      <style:text-properties fo:font-style="normal" officeooo:rsid="089cc348" style:font-style-asian="normal" style:font-style-complex="normal"/>
    </style:style>
    <style:style style:name="T53" style:family="text">
      <style:text-properties fo:font-style="normal" officeooo:rsid="08a36a7b" style:font-style-asian="normal" style:font-style-complex="normal"/>
    </style:style>
    <style:style style:name="T54" style:family="text">
      <style:text-properties fo:font-style="normal" officeooo:rsid="08a563d0" style:font-style-asian="normal" style:font-style-complex="normal"/>
    </style:style>
    <style:style style:name="T55" style:family="text">
      <style:text-properties fo:font-style="normal" officeooo:rsid="08af0c46" style:font-style-asian="normal" style:font-style-complex="normal"/>
    </style:style>
    <style:style style:name="T56" style:family="text">
      <style:text-properties fo:font-style="normal" officeooo:rsid="0b6eb22d" style:font-style-asian="normal" style:font-style-complex="normal"/>
    </style:style>
    <style:style style:name="T57" style:family="text">
      <style:text-properties fo:font-size="12pt" fo:language="en" fo:country="GB" style:font-size-asian="12pt" style:font-size-complex="12pt"/>
    </style:style>
    <style:style style:name="T58" style:family="text">
      <style:text-properties fo:font-size="12pt" fo:language="en" fo:country="GB" officeooo:rsid="06875837" style:font-size-asian="12pt" style:font-size-complex="12pt"/>
    </style:style>
    <style:style style:name="T59" style:family="text">
      <style:text-properties fo:font-size="12pt" fo:language="en" fo:country="GB" officeooo:rsid="0692fbc2" style:font-size-asian="12pt" style:font-size-complex="12pt"/>
    </style:style>
    <style:style style:name="T60" style:family="text">
      <style:text-properties fo:font-size="12pt" fo:language="en" fo:country="GB" officeooo:rsid="069a5aef" style:font-size-asian="12pt" style:font-size-complex="12pt"/>
    </style:style>
    <style:style style:name="T61" style:family="text">
      <style:text-properties fo:font-size="12pt" fo:language="en" fo:country="GB" officeooo:rsid="06b4e8a8" style:font-size-asian="12pt" style:font-size-complex="12pt"/>
    </style:style>
    <style:style style:name="T62" style:family="text">
      <style:text-properties fo:font-size="12pt" fo:language="en" fo:country="GB" officeooo:rsid="06c318ce" style:font-size-asian="12pt" style:font-size-complex="12pt"/>
    </style:style>
    <style:style style:name="T63" style:family="text">
      <style:text-properties fo:font-size="12pt" fo:language="en" fo:country="GB" officeooo:rsid="017c67b9" style:font-size-asian="12pt" style:font-size-complex="12pt"/>
    </style:style>
    <style:style style:name="T64" style:family="text">
      <style:text-properties fo:font-size="12pt" fo:language="en" fo:country="GB" fo:font-style="normal" fo:font-weight="normal" officeooo:rsid="05a0db06" style:font-size-asian="12pt" style:font-style-asian="normal" style:font-weight-asian="normal" style:font-size-complex="12pt" style:font-style-complex="normal" style:font-weight-complex="normal"/>
    </style:style>
    <style:style style:name="T65" style:family="text">
      <style:text-properties fo:font-size="12pt" fo:language="en" fo:country="GB" fo:font-style="italic" fo:font-weight="bold" officeooo:rsid="05a0db06" style:font-size-asian="12pt" style:font-style-asian="italic" style:font-weight-asian="bold" style:font-size-complex="12pt" style:font-style-complex="italic" style:font-weight-complex="bold"/>
    </style:style>
    <style:style style:name="T66" style:family="text">
      <style:text-properties fo:font-size="12pt" style:text-underline-style="none" fo:font-weight="normal" style:font-size-asian="12pt" style:font-weight-asian="normal" style:font-size-complex="12pt" style:font-weight-complex="normal"/>
    </style:style>
    <style:style style:name="T67" style:family="text">
      <style:text-properties fo:font-size="12pt" style:text-underline-style="none" fo:font-weight="normal" officeooo:rsid="00456be3" style:font-size-asian="12pt" style:font-weight-asian="normal" style:font-size-complex="12pt" style:font-weight-complex="normal"/>
    </style:style>
    <style:style style:name="T68" style:family="text">
      <style:text-properties fo:font-size="12pt" style:text-underline-style="none" fo:font-weight="normal" officeooo:rsid="00456be3" fo:background-color="transparent" loext:char-shading-value="0" style:font-size-asian="12pt" style:font-weight-asian="normal" style:font-size-complex="12pt" style:font-weight-complex="normal"/>
    </style:style>
    <style:style style:name="T69" style:family="text">
      <style:text-properties officeooo:rsid="08984da0"/>
    </style:style>
    <style:style style:name="T70" style:family="text">
      <style:text-properties officeooo:rsid="090bca93"/>
    </style:style>
    <style:style style:name="T71" style:family="text">
      <style:text-properties officeooo:rsid="090f2ae8"/>
    </style:style>
    <style:style style:name="T72" style:family="text">
      <style:text-properties officeooo:rsid="002ba39e"/>
    </style:style>
    <style:style style:name="T73" style:family="text">
      <style:text-properties officeooo:rsid="01fb6d37"/>
    </style:style>
    <style:style style:name="T74" style:family="text">
      <style:text-properties officeooo:rsid="001bd03f"/>
    </style:style>
    <style:style style:name="T75" style:family="text">
      <style:text-properties officeooo:rsid="001d6af4"/>
    </style:style>
    <style:style style:name="T76" style:family="text">
      <style:text-properties style:font-name="Liberation Serif" fo:font-size="12pt" fo:font-style="normal" style:font-size-asian="12pt" style:font-style-asian="normal" style:font-size-complex="12pt" style:font-style-complex="normal"/>
    </style:style>
    <style:style style:name="T77" style:family="text">
      <style:text-properties style:font-name="Liberation Serif" fo:font-size="12pt" fo:font-style="normal" officeooo:rsid="001f37d0" style:font-size-asian="12pt" style:font-style-asian="normal" style:font-size-complex="12pt" style:font-style-complex="normal"/>
    </style:style>
    <style:style style:name="T78" style:family="text">
      <style:text-properties style:font-name="Liberation Serif" fo:font-size="12pt" fo:font-style="normal" fo:font-weight="normal" officeooo:rsid="001b0f2c"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1f37d0"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1ab2fd8" style:font-size-asian="12pt" style:font-style-asian="normal" style:font-weight-asian="normal" style:font-size-complex="12pt" style:font-style-complex="normal" style:font-weight-complex="normal"/>
    </style:style>
    <style:style style:name="T81" style:family="text">
      <style:text-properties style:use-window-font-color="true" fo:background-color="transparent" loext:char-shading-value="0"/>
    </style:style>
    <style:style style:name="T82" style:family="text">
      <style:text-properties fo:font-weight="bold" style:font-weight-asian="bold" style:font-weight-complex="bold"/>
    </style:style>
    <style:style style:name="T83" style:family="text">
      <style:text-properties fo:font-weight="bold" officeooo:rsid="0199ba20" style:font-weight-asian="bold" style:font-weight-complex="bold"/>
    </style:style>
    <style:style style:name="T84" style:family="text">
      <style:text-properties fo:font-weight="bold" officeooo:rsid="019e389e" style:font-weight-asian="bold" style:font-weight-complex="bold"/>
    </style:style>
    <style:style style:name="T85" style:family="text">
      <style:text-properties fo:font-weight="bold" officeooo:rsid="00ae30eb" style:font-weight-asian="bold" style:font-weight-complex="bold"/>
    </style:style>
    <style:style style:name="T86" style:family="text">
      <style:text-properties fo:font-weight="bold" officeooo:rsid="01bc2d35" style:font-weight-asian="bold" style:font-weight-complex="bold"/>
    </style:style>
    <style:style style:name="T87" style:family="text">
      <style:text-properties fo:font-weight="bold" officeooo:rsid="01c0fd28" style:font-weight-asian="bold" style:font-weight-complex="bold"/>
    </style:style>
    <style:style style:name="T88" style:family="text">
      <style:text-properties fo:font-weight="bold" officeooo:rsid="00ae30eb" style:font-weight-asian="bold"/>
    </style:style>
    <style:style style:name="T89" style:family="text">
      <style:text-properties fo:font-weight="bold" officeooo:rsid="01842102" style:font-weight-asian="bold"/>
    </style:style>
    <style:style style:name="T90" style:family="text">
      <style:text-properties officeooo:rsid="00230ed3"/>
    </style:style>
    <style:style style:name="T91" style:family="text">
      <style:text-properties officeooo:rsid="002c007e"/>
    </style:style>
    <style:style style:name="T92" style:family="text">
      <style:text-properties officeooo:rsid="003291fa"/>
    </style:style>
    <style:style style:name="T93" style:family="text">
      <style:text-properties officeooo:rsid="00344c69"/>
    </style:style>
    <style:style style:name="T94" style:family="text">
      <style:text-properties officeooo:rsid="0036260f"/>
    </style:style>
    <style:style style:name="T95" style:family="text">
      <style:text-properties officeooo:rsid="003977eb"/>
    </style:style>
    <style:style style:name="T96" style:family="text">
      <style:text-properties officeooo:rsid="003c65b9"/>
    </style:style>
    <style:style style:name="T97" style:family="text">
      <style:text-properties officeooo:rsid="0043c3ee"/>
    </style:style>
    <style:style style:name="T98" style:family="text">
      <style:text-properties fo:font-style="italic" officeooo:rsid="0043c3ee" style:font-style-asian="italic" style:font-style-complex="italic"/>
    </style:style>
    <style:style style:name="T99" style:family="text">
      <style:text-properties fo:font-style="italic" fo:font-weight="normal" officeooo:rsid="004b8320" style:font-style-asian="italic" style:font-weight-asian="normal" style:font-style-complex="italic" style:font-weight-complex="normal"/>
    </style:style>
    <style:style style:name="T100" style:family="text">
      <style:text-properties fo:font-style="italic" fo:font-weight="bold" officeooo:rsid="018380c2" style:font-style-asian="italic" style:font-weight-asian="bold" style:font-style-complex="italic" style:font-weight-complex="bold"/>
    </style:style>
    <style:style style:name="T101" style:family="text">
      <style:text-properties officeooo:rsid="00542e3a"/>
    </style:style>
    <style:style style:name="T102" style:family="text">
      <style:text-properties fo:language="en" fo:country="GB"/>
    </style:style>
    <style:style style:name="T103" style:family="text">
      <style:text-properties fo:language="en" fo:country="GB" style:language-asian="ko" style:country-asian="KR"/>
    </style:style>
    <style:style style:name="T104" style:family="text">
      <style:text-properties fo:language="en" fo:country="GB" officeooo:rsid="00e0fc15" style:language-asian="ko" style:country-asian="KR"/>
    </style:style>
    <style:style style:name="T105" style:family="text">
      <style:text-properties fo:language="en" fo:country="GB" officeooo:rsid="017f7b6b" style:language-asian="ko" style:country-asian="KR"/>
    </style:style>
    <style:style style:name="T106" style:family="text">
      <style:text-properties fo:language="en" fo:country="GB" officeooo:rsid="018118a1" style:language-asian="ko" style:country-asian="KR"/>
    </style:style>
    <style:style style:name="T107" style:family="text">
      <style:text-properties fo:language="en" fo:country="GB" officeooo:rsid="01825c79" style:language-asian="ko" style:country-asian="KR"/>
    </style:style>
    <style:style style:name="T108" style:family="text">
      <style:text-properties fo:language="en" fo:country="GB" officeooo:rsid="0008e6b8" style:language-asian="ko" style:country-asian="KR"/>
    </style:style>
    <style:style style:name="T109" style:family="text">
      <style:text-properties fo:language="en" fo:country="GB" officeooo:rsid="00608cce" style:language-asian="ko" style:country-asian="KR"/>
    </style:style>
    <style:style style:name="T110" style:family="text">
      <style:text-properties fo:language="en" fo:country="GB" officeooo:rsid="006f51db" style:language-asian="ko" style:country-asian="KR"/>
    </style:style>
    <style:style style:name="T111" style:family="text">
      <style:text-properties fo:language="en" fo:country="GB" officeooo:rsid="017c67b9"/>
    </style:style>
    <style:style style:name="T112" style:family="text">
      <style:text-properties fo:language="en" fo:country="GB" officeooo:rsid="017f7b6b"/>
    </style:style>
    <style:style style:name="T113" style:family="text">
      <style:text-properties officeooo:rsid="00589494"/>
    </style:style>
    <style:style style:name="T114" style:family="text">
      <style:text-properties officeooo:rsid="005cad17"/>
    </style:style>
    <style:style style:name="T115" style:family="text">
      <style:text-properties officeooo:rsid="00608cce"/>
    </style:style>
    <style:style style:name="T116" style:family="text">
      <style:text-properties officeooo:rsid="009211bd"/>
    </style:style>
    <style:style style:name="T117" style:family="text">
      <style:text-properties officeooo:rsid="00a07747"/>
    </style:style>
    <style:style style:name="T118" style:family="text">
      <style:text-properties officeooo:rsid="00a2870a"/>
    </style:style>
    <style:style style:name="T119" style:family="text">
      <style:text-properties officeooo:rsid="00a478ad"/>
    </style:style>
    <style:style style:name="T120" style:family="text">
      <style:text-properties officeooo:rsid="00a97055"/>
    </style:style>
    <style:style style:name="T121" style:family="text">
      <style:text-properties officeooo:rsid="00aa8980"/>
    </style:style>
    <style:style style:name="T122" style:family="text">
      <style:text-properties officeooo:rsid="00ae30eb"/>
    </style:style>
    <style:style style:name="T123" style:family="text">
      <style:text-properties officeooo:rsid="00afb2cd"/>
    </style:style>
    <style:style style:name="T124" style:family="text">
      <style:text-properties officeooo:rsid="00b293d0"/>
    </style:style>
    <style:style style:name="T125" style:family="text">
      <style:text-properties officeooo:rsid="00eb61a8"/>
    </style:style>
    <style:style style:name="T126" style:family="text">
      <style:text-properties officeooo:rsid="00ec69a8"/>
    </style:style>
    <style:style style:name="T127" style:family="text">
      <style:text-properties officeooo:rsid="01022e4e"/>
    </style:style>
    <style:style style:name="T128" style:family="text">
      <style:text-properties officeooo:rsid="01032649"/>
    </style:style>
    <style:style style:name="T129" style:family="text">
      <style:text-properties officeooo:rsid="0104553d"/>
    </style:style>
    <style:style style:name="T130" style:family="text">
      <style:text-properties officeooo:rsid="01074676"/>
    </style:style>
    <style:style style:name="T131" style:family="text">
      <style:text-properties officeooo:rsid="01191ed2"/>
    </style:style>
    <style:style style:name="T132" style:family="text">
      <style:text-properties officeooo:rsid="011de6d0"/>
    </style:style>
    <style:style style:name="T133" style:family="text">
      <style:text-properties officeooo:rsid="012c15c2"/>
    </style:style>
    <style:style style:name="T134" style:family="text">
      <style:text-properties officeooo:rsid="012ddad5"/>
    </style:style>
    <style:style style:name="T135" style:family="text">
      <style:text-properties officeooo:rsid="014012d5"/>
    </style:style>
    <style:style style:name="T136" style:family="text">
      <style:text-properties officeooo:rsid="0149d5bf"/>
    </style:style>
    <style:style style:name="T137" style:family="text">
      <style:text-properties officeooo:rsid="014d7a61"/>
    </style:style>
    <style:style style:name="T138" style:family="text">
      <style:text-properties officeooo:rsid="014e44fd"/>
    </style:style>
    <style:style style:name="T139" style:family="text">
      <style:text-properties officeooo:rsid="016fc2b4"/>
    </style:style>
    <style:style style:name="T140" style:family="text">
      <style:text-properties officeooo:rsid="0178d57b"/>
    </style:style>
    <style:style style:name="T141" style:family="text">
      <style:text-properties officeooo:rsid="017c67b9"/>
    </style:style>
    <style:style style:name="T142" style:family="text">
      <style:text-properties officeooo:rsid="017e1d16"/>
    </style:style>
    <style:style style:name="T143" style:family="text">
      <style:text-properties officeooo:rsid="017f7b6b"/>
    </style:style>
    <style:style style:name="T144" style:family="text">
      <style:text-properties officeooo:rsid="018380c2"/>
    </style:style>
    <style:style style:name="T145" style:family="text">
      <style:text-properties officeooo:rsid="0183e0df"/>
    </style:style>
    <style:style style:name="T146" style:family="text">
      <style:text-properties officeooo:rsid="018cb2f2"/>
    </style:style>
    <style:style style:name="T147" style:family="text">
      <style:text-properties officeooo:rsid="0193d6cb"/>
    </style:style>
    <style:style style:name="T148" style:family="text">
      <style:text-properties officeooo:rsid="01958b18"/>
    </style:style>
    <style:style style:name="T149" style:family="text">
      <style:text-properties officeooo:rsid="0196566c"/>
    </style:style>
    <style:style style:name="T150" style:family="text">
      <style:text-properties officeooo:rsid="0197089e"/>
    </style:style>
    <style:style style:name="T151" style:family="text">
      <style:text-properties officeooo:rsid="0198906d"/>
    </style:style>
    <style:style style:name="T152" style:family="text">
      <style:text-properties officeooo:rsid="0198b314"/>
    </style:style>
    <style:style style:name="T153" style:family="text">
      <style:text-properties officeooo:rsid="0199adb5"/>
    </style:style>
    <style:style style:name="T154" style:family="text">
      <style:text-properties officeooo:rsid="0199ba20"/>
    </style:style>
    <style:style style:name="T155" style:family="text">
      <style:text-properties officeooo:rsid="019b1c4d"/>
    </style:style>
    <style:style style:name="T156" style:family="text">
      <style:text-properties officeooo:rsid="019b2fed"/>
    </style:style>
    <style:style style:name="T157" style:family="text">
      <style:text-properties officeooo:rsid="01a6137e"/>
    </style:style>
    <style:style style:name="T158" style:family="text">
      <style:text-properties officeooo:rsid="01a940d9"/>
    </style:style>
    <style:style style:name="T159" style:family="text">
      <style:text-properties officeooo:rsid="00a68018"/>
    </style:style>
    <style:style style:name="T160" style:family="text">
      <style:text-properties officeooo:rsid="01aa5453"/>
    </style:style>
    <style:style style:name="T161" style:family="text">
      <style:text-properties officeooo:rsid="01ab2fd8"/>
    </style:style>
    <style:style style:name="T162" style:family="text">
      <style:text-properties officeooo:rsid="01ad0820"/>
    </style:style>
    <style:style style:name="T163" style:family="text">
      <style:text-properties officeooo:rsid="01af4c88"/>
    </style:style>
    <style:style style:name="T164" style:family="text">
      <style:text-properties officeooo:rsid="01b5423d"/>
    </style:style>
    <style:style style:name="T165" style:family="text">
      <style:text-properties officeooo:rsid="01b8e164"/>
    </style:style>
    <style:style style:name="T166" style:family="text">
      <style:text-properties officeooo:rsid="01b9ec2e"/>
    </style:style>
    <style:style style:name="T167" style:family="text">
      <style:text-properties officeooo:rsid="01bb73ac"/>
    </style:style>
    <style:style style:name="T168" style:family="text">
      <style:text-properties officeooo:rsid="01bc2d35"/>
    </style:style>
    <style:style style:name="T169" style:family="text">
      <style:text-properties officeooo:rsid="001f583f"/>
    </style:style>
    <style:style style:name="T170" style:family="text">
      <style:text-properties officeooo:rsid="01bcdc13"/>
    </style:style>
    <style:style style:name="T171" style:family="text">
      <style:text-properties officeooo:rsid="01c01014"/>
    </style:style>
    <style:style style:name="T172" style:family="text">
      <style:text-properties officeooo:rsid="01c0408b"/>
    </style:style>
    <style:style style:name="T173" style:family="text">
      <style:text-properties officeooo:rsid="01c0fd28"/>
    </style:style>
    <style:style style:name="T174" style:family="text">
      <style:text-properties officeooo:rsid="01c88471"/>
    </style:style>
    <style:style style:name="T17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fill-color="#66ffff" draw:textarea-horizontal-align="justify" draw:textarea-vertical-align="top" draw:auto-grow-height="false" fo:min-height="1.4602in" fo:min-width="1.5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66ffff" draw:textarea-horizontal-align="justify" draw:textarea-vertical-align="middle" draw:auto-grow-height="false" fo:min-height="1.561in" fo:min-width="1.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66ffff" draw:textarea-horizontal-align="justify" draw:textarea-vertical-align="middle" draw:auto-grow-height="false" fo:min-height="0.5165in" fo:min-width="0.7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9900" draw:textarea-horizontal-align="justify" draw:textarea-vertical-align="middle" draw:auto-grow-height="false" fo:min-height="0.0429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6600" draw:textarea-horizontal-align="justify" draw:textarea-vertical-align="middle" draw:auto-grow-height="false" fo:min-height="0.0382in" fo:min-width="1.2764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Collaborative OER adoption by a Professional Learning Community, a model of Teacher Professional Development</text:p>
      <text:p text:style-name="P65">Theme 4 – ICT in Teacher Professional Development (TPD)</text:p>
      <text:p text:style-name="P66">Author<text:span text:style-name="T47">s</text:span> →<text:span text:style-name="T48"> Sri. Gurumurthy Kasinathan, Director IT for Change and Ms. Sriranjani Ranganathan</text:span>, <text:span text:style-name="T49">Deputy Director IT for Change</text:span> </text:p>
      <text:p text:style-name="P5">First Author → Cell: 9<text:span text:style-name="T50">8454 37730<text:tab/></text:span>Mail: <text:a xlink:type="simple" xlink:href="mailto:Guru@itforchange.net" text:style-name="Internet_20_link" text:visited-style-name="Visited_20_Internet_20_Link"><text:span text:style-name="T50">Guru</text:span></text:a><text:a xlink:type="simple" xlink:href="mailto:Guru@itforchange.net" text:style-name="Internet_20_link" text:visited-style-name="Visited_20_Internet_20_Link">@</text:a><text:a xlink:type="simple" xlink:href="mailto:Guru@itforchange.net" text:style-name="Internet_20_link" text:visited-style-name="Visited_20_Internet_20_Link"><text:span text:style-name="T50">itforchange.net</text:span></text:a><text:span text:style-name="T50">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26752_493487126" text:style-name="Index_20_Link" text:visited-style-name="Index_20_Link">Background<text:tab/>1</text:a></text:p>
          <text:p text:style-name="P100"><text:a xlink:type="simple" xlink:href="#__RefHeading___Toc17850_663672711" text:style-name="Index_20_Link" text:visited-style-name="Index_20_Link">Context of Indian education<text:tab/>2</text:a></text:p>
          <text:p text:style-name="P98"><text:a xlink:type="simple" xlink:href="#__RefHeading___Toc17852_663672711" text:style-name="Index_20_Link" text:visited-style-name="Index_20_Link">Availability of educational resources<text:tab/>2</text:a></text:p>
          <text:p text:style-name="P101"><text:a xlink:type="simple" xlink:href="#__RefHeading___Toc4740_1009653035" text:style-name="Index_20_Link" text:visited-style-name="Index_20_Link">Experimenting with digital resources<text:tab/>3</text:a></text:p>
          <text:p text:style-name="P98"><text:a xlink:type="simple" xlink:href="#__RefHeading___Toc17854_663672711" text:style-name="Index_20_Link" text:visited-style-name="Index_20_Link">Quality of teacher development<text:tab/>3</text:a></text:p>
          <text:p text:style-name="P100"><text:a xlink:type="simple" xlink:href="#__RefHeading___Toc6431_1818222027" text:style-name="Index_20_Link" text:visited-style-name="Index_20_Link">The Subject Teacher Forum and Karnataka Open Educational Resources<text:tab/>4</text:a></text:p>
          <text:p text:style-name="P100"><text:a xlink:type="simple" xlink:href="#__RefHeading___Toc4971_1972747166" text:style-name="Index_20_Link" text:visited-style-name="Index_20_Link">Objective of this study<text:tab/>6</text:a></text:p>
          <text:p text:style-name="P100"><text:a xlink:type="simple" xlink:href="#__RefHeading___Toc19252_663672711" text:style-name="Index_20_Link" text:visited-style-name="Index_20_Link">Methodology<text:tab/>6</text:a></text:p>
          <text:p text:style-name="P98"><text:a xlink:type="simple" xlink:href="#__RefHeading___Toc4983_1993471712" text:style-name="Index_20_Link" text:visited-style-name="Index_20_Link">Email analysis<text:tab/>6</text:a></text:p>
          <text:p text:style-name="P98"><text:a xlink:type="simple" xlink:href="#__RefHeading___Toc4985_1993471712" text:style-name="Index_20_Link" text:visited-style-name="Index_20_Link">Focused Group Discussions<text:tab/>7</text:a></text:p>
          <text:p text:style-name="P100"><text:a xlink:type="simple" xlink:href="#__RefHeading___Toc19254_663672711" text:style-name="Index_20_Link" text:visited-style-name="Index_20_Link">Findings<text:tab/>7</text:a></text:p>
          <text:p text:style-name="P98"><text:a xlink:type="simple" xlink:href="#__RefHeading___Toc19256_663672711" text:style-name="Index_20_Link" text:visited-style-name="Index_20_Link">Digital resource creation process<text:tab/>7</text:a></text:p>
          <text:p text:style-name="P101"><text:a xlink:type="simple" xlink:href="#__RefHeading___Toc19258_663672711" text:style-name="Index_20_Link" text:visited-style-name="Index_20_Link">Analysis of emails shared in the PLC<text:tab/>9</text:a></text:p>
          <text:p text:style-name="P99"><text:a xlink:type="simple" xlink:href="#__RefHeading___Toc4211_1818222027" text:style-name="Index_20_Link" text:visited-style-name="Index_20_Link">Responding to mails<text:tab/>9</text:a></text:p>
          <text:p text:style-name="P99"><text:a xlink:type="simple" xlink:href="#__RefHeading___Toc4931_1009653035" text:style-name="Index_20_Link" text:visited-style-name="Index_20_Link">Kinds of mails<text:tab/>9</text:a></text:p>
          <text:p text:style-name="P99"><text:a xlink:type="simple" xlink:href="#__RefHeading___Toc5272_520906967" text:style-name="Index_20_Link" text:visited-style-name="Index_20_Link">Format of resources shared<text:tab/>11</text:a></text:p>
          <text:p text:style-name="P99"><text:a xlink:type="simple" xlink:href="#__RefHeading___Toc5276_520906967" text:style-name="Index_20_Link" text:visited-style-name="Index_20_Link">An understanding of the nature of OER<text:tab/>11</text:a></text:p>
          <text:p text:style-name="P101"><text:a xlink:type="simple" xlink:href="#__RefHeading___Toc4933_1009653035" text:style-name="Index_20_Link" text:visited-style-name="Index_20_Link">Big data analyses of the PLC mails using Watson<text:tab/>13</text:a></text:p>
          <text:p text:style-name="P98"><text:a xlink:type="simple" xlink:href="#__RefHeading___Toc19262_663672711" text:style-name="Index_20_Link" text:visited-style-name="Index_20_Link">Dialectic between the OER core group and the PLC<text:tab/>14</text:a></text:p>
          <text:p text:style-name="P101"><text:a xlink:type="simple" xlink:href="#__RefHeading___Toc4991_1517448564" text:style-name="Index_20_Link" text:visited-style-name="Index_20_Link">Membership of the core group<text:tab/>14</text:a></text:p>
          <text:p text:style-name="P101"><text:a xlink:type="simple" xlink:href="#__RefHeading___Toc4999_1517448564" text:style-name="Index_20_Link" text:visited-style-name="Index_20_Link">PLC both a source and context for OER creation<text:tab/>17</text:a></text:p>
          <text:p text:style-name="P99"><text:a xlink:type="simple" xlink:href="#__RefHeading___Toc5279_520906967" text:style-name="Index_20_Link" text:visited-style-name="Index_20_Link">Influence of PLC interactions on OER design and creation<text:tab/>17</text:a></text:p>
          <text:p text:style-name="P99"><text:a xlink:type="simple" xlink:href="#__RefHeading___Toc5281_520906967" text:style-name="Index_20_Link" text:visited-style-name="Index_20_Link">PLC as a forum for disseminating OER<text:tab/>18</text:a></text:p>
          <text:p text:style-name="P100"><text:a xlink:type="simple" xlink:href="#__RefHeading___Toc6563_1517448564" text:style-name="Index_20_Link" text:visited-style-name="Index_20_Link">Challenges<text:tab/>19</text:a></text:p>
          <text:p text:style-name="P100"><text:a xlink:type="simple" xlink:href="#__RefHeading___Toc6565_1517448564" text:style-name="Index_20_Link" text:visited-style-name="Index_20_Link">Conclusion<text:tab/>20</text:a></text:p>
        </text:index-body>
      </text:table-of-content>
      <text:h text:style-name="P126" text:outline-level="1"><text:bookmark-start text:name="__RefHeading___Toc26752_493487126"/>Background<text:bookmark-end text:name="__RefHeading___Toc26752_493487126"/></text:h>
      <text:p text:style-name="P21"><text:span text:style-name="T52">The authors, as </text:span><text:span text:style-name="T53">members</text:span><text:span text:style-name="T52"> of IT for Change, </text:span><text:span text:style-name="T54">a</text:span><text:span text:style-name="T55">n</text:span><text:span text:style-name="T54"> NGO working in the area of digital technologies and social change, </text:span><text:span text:style-name="T52">participated in t</text:span><text:span text:style-name="T51">he ‘Subject Teacher Forum </text:span><text:span text:style-name="T56">program</text:span><text:span text:style-name="T56"><text:note text:id="ftn1" text:note-class="footnote"><text:note-citation>1</text:note-citation><text:note-body><text:p text:style-name="P76">See <text:a xlink:type="simple" xlink:href="http://karnatakaeducation.org.in/KOER/en/index.php/Subject_Teacher_Forum" text:style-name="Internet_20_link" text:visited-style-name="Visited_20_Internet_20_Link">http://karnatakaeducation.org.in/KOER/en/index.php/Subject_Teacher_Forum</text:a> </text:p></text:note-body></text:note></text:span><text:span text:style-name="T56"> </text:span>(STF), <text:span text:style-name="T3">an in-service </text:span><text:span text:style-name="T4">Teacher Professional Development (</text:span><text:span text:style-name="T3">TPD</text:span><text:span text:style-name="T4">)</text:span><text:span text:style-name="T3"> </text:span><text:span text:style-name="T5">program </text:span><text:span text:style-name="T6">for </text:span><text:span text:style-name="T7">government </text:span><text:span text:style-name="T8">high school </text:span><text:span text:style-name="T9">teachers across </text:span><text:span text:style-name="T10">Karnataka, </text:span><text:span text:style-name="T19">between 2011 and 2016</text:span><text:span text:style-name="T5">. </text:span><text:span text:style-name="T12">The primary purpose of </text:span><text:span text:style-name="T13">the </text:span><text:span text:style-name="T16">Subject Teacher Forum</text:span><text:span text:style-name="T12"> </text:span><text:span text:style-name="T15">wa</text:span><text:span text:style-name="T12">s </text:span><text:span text:style-name="T13">to demonstrate a technology mediated model of </text:span><text:span text:style-name="T12">continuing teacher professional development</text:span><text:span text:style-name="T14">, </text:span><text:span text:style-name="T13">introducing teachers to different digital tools </text:span><text:span text:style-name="T16">for creating resources and </text:span><text:span text:style-name="T13">and </text:span><text:span text:style-name="T17">for </text:span><text:span text:style-name="T13">connecting </text:span><text:span text:style-name="T17">with one </text:span><text:span text:style-name="T13">another through a </text:span><text:soft-page-break/><text:span text:style-name="T13">state-wide </text:span><text:span text:style-name="T18">mailing list based </text:span><text:span text:style-name="T13">Professional Learning Community </text:span><text:span text:style-name="T11">(PLC). <text:s/></text:span>As a part of <text:span text:style-name="T140">the Subject Teacher Forum</text:span> program, <text:span text:style-name="T165">the </text:span>DSERT began a related initiative called the ‘Karnataka Open Educational Resources’ (KOER) to publish the resources shared in the state-wide mailing lists. A core group of mathematics, science and social science teachers, <text:span text:style-name="T113">members of the state-wide PLC</text:span>, were selected to lead t<text:span text:style-name="T141">his development of Open Educational Resources (OER)</text:span>. <text:s/><text:span text:style-name="T102">Th</text:span><text:span text:style-name="T111">is core </text:span><text:span text:style-name="T112">g</text:span><text:span text:style-name="T111">roup </text:span><text:span text:style-name="T102">learnt to access, create, revis</text:span><text:span text:style-name="T60">e, </text:span><text:span text:style-name="T59">remix and publish </text:span><text:span text:style-name="T58">O</text:span><text:span text:style-name="T61">ER </text:span><text:span text:style-name="T62">on </text:span><text:span text:style-name="T59">the </text:span><text:a xlink:type="simple" xlink:href="http://karnatakaeducation.org.in/KOER/en/index.php/Main_Page" text:style-name="Internet_20_link" text:visited-style-name="Visited_20_Internet_20_Link"><text:span text:style-name="T63">KOER</text:span></text:a><text:span text:style-name="T64"><text:note text:id="ftn2" text:note-class="footnote"><text:note-citation>2</text:note-citation><text:note-body><text:p text:style-name="P77">See <text:a xlink:type="simple" xlink:href="http://karnatakaeducation.org.in/KOER/en/index.php/Main_Page" text:style-name="Internet_20_link" text:visited-style-name="Visited_20_Internet_20_Link">http://karnatakaeducation.org.in/KOER/en/index.php/Main_Page</text:a> </text:p></text:note-body></text:note></text:span><text:span text:style-name="T65"> </text:span><text:span text:style-name="T57">repository</text:span><text:span text:style-name="T59">.</text:span></text:p>
      <text:p text:style-name="P5"><text:span text:style-name="T69">The ai</text:span>m of the paper is to understand <text:span text:style-name="T70">how an OER creation process embedded within a PLC can support the adoption of OER in a government school system as well as provide a method of TPD. <text:s/></text:span></text:p>
      <text:h text:style-name="P126" text:outline-level="1"><text:bookmark-start text:name="__RefHeading___Toc17850_663672711"/>Context of Indian education<text:bookmark-end text:name="__RefHeading___Toc17850_663672711"/></text:h>
      <text:p text:style-name="P64">India has more than 1.6 million schools, of which more than 70% are public (meaning government) schools (District Information on School Education, 2013­-14<text:note text:id="ftn3" text:note-class="footnote"><text:note-citation>3</text:note-citation><text:note-body><text:p text:style-name="P78">This is an annual compilation of information from all schools, by the MHRD (Ministry of Human Resources </text:p><text:p text:style-name="P78">Development), Government of India</text:p></text:note-body></text:note>). These government schools typically cater to children from the most marginalized sections of Indian society, since they offer free tuition as well as <text:span text:style-name="T165">incentives </text:span>such as free textbooks, free school uniforms, lunch, bicycles and scholarships.</text:p>
      <text:p text:style-name="P64">Government schools do, however, face serious challenges in terms of the quality of education offered. Some reasons for the poor quality of learning in India are socio­cultural; focus on universal school <text:span text:style-name="T125">education </text:span>received serious attention in India after the “National policy on Education, 1986”. <text:span text:style-name="T126">Secondly, </text:span>India <text:s/>has the largest population of illiterate adults in the world<text:note text:id="ftn4" text:note-class="footnote"><text:note-citation>4</text:note-citation><text:note-body><text:p text:style-name="P78">See UNESCO. 2014 Education for All Global Monitoring Report (GMR), accessible from </text:p><text:p text:style-name="P78"><text:a xlink:type="simple" xlink:href="http://en.unesco.org/gem" text:style-name="Internet_20_link" text:visited-style-name="Visited_20_Internet_20_Link">http://en.unesco.org/gem</text:a>­report/allreports </text:p></text:note-body></text:note> and hence, many of the children who are currently attending school are <text:s/>“first generation school goers” who receive little or no support at home. Other reasons impacting the quality of learning are pedagogical and structural such as limited availability of curricular resources (Kanwar, Kodhandaraman &amp; Umar, 2010), inadequate school infrastructure and inadequate teacher professional development processes (see for instance PROBE report, 1998), all of which create an impoverished learning environment. </text:p>
      <text:h text:style-name="P131" text:outline-level="2"><text:bookmark-start text:name="__RefHeading___Toc17852_663672711"/>Availability of educational resources <text:bookmark-end text:name="__RefHeading___Toc17852_663672711"/></text:h>
      <text:p text:style-name="P3">Content and process (curriculum and pedagogy) are generally acknowledged as the two intertwined components of learning. Eisner (1991, page 11) states: “Like the systole and diastole of the beating heart, curriculum and teaching are the most fundamental aspects... “ India, however, <text:s/>has what has been termed a “textbook culture” (Kumar, 1988), in that the textbook is seen as the single, definitive resource for teaching. <text:span text:style-name="T116">He writes “… </text:span>. Textbooks are prescribed for each subject, and the teacher is <text:soft-page-break/>expected to elucidate the text, lesson by lesson in the given order...”. The Department of Education in most states supplies textbooks for all subjects free of cost to all teachers and students. </text:p>
      <text:p text:style-name="P3">This emphasis on the textbook is reinforced by the limited availability of alternative resources. Consequently, many teachers mostly use only the textbook, <text:span text:style-name="T141">rather </text:span>than additional resources, in their teaching. This <text:span text:style-name="T165">reinforces </text:span>teachers’ perceptions of the<text:span text:style-name="T165">mselves as </text:span>a “'minor technician” (Scheffler, 1973), merely utilising the resources and approaches made available through government channels. </text:p>
      <text:h text:style-name="P135" text:outline-level="3"><text:bookmark-start text:name="__RefHeading___Toc4740_1009653035"/>Experimenting with digital resources<text:bookmark-end text:name="__RefHeading___Toc4740_1009653035"/></text:h>
      <text:p text:style-name="P2">Different states were experimenting with technology enabled resources as a method of <text:span text:style-name="T71">developing resources for</text:span> supplementing the textbook <text:span text:style-name="T71">and addressing the quality of education</text:span>. <text:s/>However, often these solutions were based on making pre-packaged e-content developed based on the textbook, thus merely reproducing the textbook in a digital format. <text:s/>Further, these resources were often developed by technology companies, with limited understanding of educational processes, <text:span text:style-name="T71">thus limiting their use in classrooms. </text:span></text:p>
      <text:p text:style-name="P4"><text:span text:style-name="T44">Recognizing the possibilities of digital technologies </text:span><text:span text:style-name="T46">in education</text:span><text:span text:style-name="T44">, the </text:span><text:span text:style-name="T21">Pedagogy Content knowledge framework, </text:span><text:span text:style-name="T44">has recently been expanded to the </text:span><text:span text:style-name="T22">Technological Pedagogical Content Knowledge </text:span><text:span text:style-name="T35">(</text:span><text:span text:style-name="T23">TPCK</text:span><text:span text:style-name="T22"><text:note text:id="ftn5" text:note-class="footnote"><text:note-citation>5</text:note-citation><text:note-body><text:p text:style-name="Footnote"><text:span text:style-name="T72">T</text:span>PACK Development in Teacher Education: A Longitudinal <text:span text:style-name="T72">S</text:span>tudy of Preservice Teachers in a Secondary M.A.Ed. Program, <text:span text:style-name="T72">Mark Hofer</text:span></text:p></text:note-body></text:note></text:span><text:span text:style-name="T22"> </text:span><text:span text:style-name="T44">)</text:span><text:span text:style-name="T35"> </text:span><text:span text:style-name="T22">framework </text:span><text:span text:style-name="T44">which </text:span><text:span text:style-name="T22">talks of content, pedagogy and technology as three domains of teacher knowledge. <text:s/></text:span><text:span text:style-name="T21">Technology can </text:span><text:span text:style-name="T44">powerfully </text:span><text:span text:style-name="T21">alter content and pedagogy. </text:span><text:span text:style-name="T24">Digital methods also provide opportunities for learning experiences to be designed based on constructionism</text:span><text:span text:style-name="T24"><text:note text:id="ftn6" text:note-class="footnote"><text:note-citation>6</text:note-citation><text:note-body><text:p text:style-name="P79"><text:s/><text:span text:style-name="T73">Constructionism: Theory of Learning or Theory of Design, Chronis Kynigos, Educational Technology Lab, Department of Education, <text:s/>School of Philosophy, University of Athens</text:span></text:p></text:note-body></text:note></text:span><text:span text:style-name="T24">, where the </text:span><text:span text:style-name="T44">learner creates to learn and learns to </text:span><text:span text:style-name="T24">crea</text:span><text:span text:style-name="T44">te. <text:s/></text:span></text:p>
      <text:h text:style-name="Heading_20_2" text:outline-level="2"><text:bookmark-start text:name="__RefHeading___Toc17854_663672711"/>Quality of teacher development<text:bookmark-end text:name="__RefHeading___Toc17854_663672711"/></text:h>
      <text:p text:style-name="P57"><text:span text:style-name="T141">Teaching is an art and craft and like any profession, has its own requirements for capacity building and development. <text:s/>One of the important factors that impacts continuous teacher development is teacher isolation. <text:s/>T</text:span>he provision of school within or close to every habitation is a policy requirement <text:span text:style-name="T141">which c</text:span>auses the public school system to be vast and dispersed<text:note text:id="ftn7" text:note-class="footnote"><text:note-citation>7</text:note-citation><text:note-body><text:p text:style-name="Footnote">The Sarva Shikshana Abhiyaan 16 <text:s/>(Sarva Shiksha Abhiyaan, 2008) programme of the central government, adopted by all provincial governments requires a lower primary education (grades 1 to 5), and upper primary school (grades 6 to 8) within 3 km within 1km of every habitation</text:p></text:note-body></text:note>. <text:span text:style-name="T142">In India, t</text:span>eachers seldom have contact with their peers in other schools or with other educational institutions. <text:s/>Training tends to be transactional <text:span text:style-name="T142">for delivering specific inputs and often there is no space for continued interaction, support or mentoring. <text:s/></text:span></text:p>
      <text:p text:style-name="P58"><text:soft-page-break/>Teacher isolation <text:span text:style-name="T165">however, does not seem to be an </text:span>isolated phenomena. <text:s/>In a survey of 196 elementary and secondary education teachers attending graduate programs in the University of Central Florida's College of Education, Rothberg (1985) found that over 80 % of teachers felt their classrooms were private worlds entered only by themselves and their students.</text:p>
      <text:p text:style-name="P27"><text:span text:style-name="T71">The National Curriculum Framework for Teacher Education, 2009, in its recommendations for in-service teacher education has articulated that spaces for sharing of experiences should be an important principle of in-service teacher education</text:span><text:span text:style-name="T71"><text:note text:id="ftn8" text:note-class="footnote"><text:note-citation>8</text:note-citation><text:note-body><text:p text:style-name="P85">National Curriculum Framework for Teacher Education, 2009</text:p></text:note-body></text:note></text:span><text:span text:style-name="T71">. <text:s/></text:span><text:span text:style-name="T21">Acknowledging the professional identity of teachers and their lived experiences to mediate content, creation of community spaces for sharing and participatory, need-based design are among the principles laid out by this framework for </text:span><text:span text:style-name="T39">developing reflective practitioners. </text:span><text:span text:style-name="T21"><text:s/></text:span><text:span text:style-name="T25">The role of ICT in providing spaces for collaborating, reflecting and creating </text:span><text:span text:style-name="T24">has been emphasized </text:span><text:span text:style-name="T25">in the redesign of teacher educ</text:span>ation programs. <text:s/></text:p>
      <text:p text:style-name="P22">The National ICT curriculum <text:span text:style-name="T114">2013</text:span>, formulated by the National Council of Educational Research and <text:s/>Training (NCERT), <text:s/>in a response to this twin challenge – of limited access to quality educational resources and inadequate teacher development – has articulated that ICT should provide collaborative spaces for teacher and student learning, and support creation of contextual learning resources, echoing the a<text:span text:style-name="T2">spirations and guidelines set in the National ICT Policy.</text:span></text:p>
      <text:h text:style-name="Heading_20_1" text:outline-level="1"><text:bookmark-start text:name="__RefHeading___Toc6431_1818222027"/>The Subject Teacher Forum and Karnataka Open Educational Resources<text:bookmark-end text:name="__RefHeading___Toc6431_1818222027"/></text:h>
      <text:p text:style-name="P28">The <text:span text:style-name="T143">Subject Teacher Forum program w</text:span>as implemented from June 2011 <text:span text:style-name="T143">as a part of the RMSA in-service teacher training, with the following key principles: </text:span></text:p>
      <text:list xml:id="list8059269547954284519" text:style-name="L1">
        <text:list-item>
          <text:p text:style-name="P102"><text:span text:style-name="T106">F</text:span><text:span text:style-name="T103">ormation of a mailing list based, state-wide Professional Learning Community in the form of subject-wise forums</text:span></text:p>
        </text:list-item>
        <text:list-item>
          <text:p text:style-name="P103"><text:span text:style-name="T107">Training the teachers in a</text:span><text:span text:style-name="T103">ccessing web resources, </text:span><text:span text:style-name="T107">including OER, </text:span><text:span text:style-name="T106">for their own learning and to go beyond the textbook</text:span></text:p>
        </text:list-item>
        <text:list-item>
          <text:p text:style-name="P104"><text:span text:style-name="T107">Introducing </text:span><text:span text:style-name="T103">Free and Open Source educational applications, text, image, audio and video authoring tools </text:span><text:span text:style-name="T105">for creating resources </text:span><text:span text:style-name="T106">for use in teaching learning</text:span></text:p>
        </text:list-item>
        <text:list-item>
          <text:p text:style-name="P104"><text:span text:style-name="T107">Training in the use of different </text:span><text:span text:style-name="T106">web based applications for connecting and collaborating including mailing forums, online forums, video conferencing</text:span><text:span text:style-name="T105"> </text:span><text:span text:style-name="T107">applications</text:span></text:p>
        </text:list-item>
        <text:list-item>
          <text:p text:style-name="P105"><text:span text:style-name="T107">Deconstructing the use of technology in teaching learning processes and introducin</text:span><text:span text:style-name="T110">g</text:span><text:span text:style-name="T107"> the Technological Pedaogogical Content Knowledge framework. </text:span></text:p>
        </text:list-item>
      </text:list>
      <text:p text:style-name="P55"><text:soft-page-break/><text:span text:style-name="T103">As a part of the program, </text:span><text:span text:style-name="T104">Mathematics, Science, Social Science, Kannada, Hindi and English</text:span><text:span text:style-name="T108"> </text:span><text:span text:style-name="T103">teachers across the state of Karnataka were trained and became a part of the PLC. <text:s text:c="3"/>Comprising </text:span><text:span text:style-name="T108">around 1</text:span><text:span text:style-name="T109">2,604</text:span><text:span text:style-name="T109"><text:note text:id="ftn9" text:note-class="footnote"><text:note-citation>9</text:note-citation><text:note-body><text:p text:style-name="P90"><text:span text:style-name="T115">Mathematics and Science teachers as at the end of September</text:span> 201<text:span text:style-name="T115">7. The number of teachers in all forums (Mathematics, Science, Social Science, Kannada, English, Hindi and Head Teachers) is 28,991 as at the end of September 2017</text:span></text:p></text:note-body></text:note></text:span><text:span text:style-name="T109"> </text:span><text:span text:style-name="T108">mathematics and science teachers from government high schools across </text:span><text:span text:style-name="T103">the state of </text:span><text:span text:style-name="T108">Karnataka, </text:span><text:span text:style-name="T103">the PLC has become a s</text:span><text:span text:style-name="T108">pace</text:span><text:span text:style-name="T108"><text:note text:id="ftn10" text:note-class="footnote"><text:note-citation>10</text:note-citation><text:note-body><text:p text:style-name="Footnote">Wawasan Open University (2016). Open Educational Resources, Vignettes of selected Asian experiences.</text:p></text:note-body></text:note></text:span><text:span text:style-name="T108"> for teachers to share ideas and experiences.</text:span></text:p>
      <text:p text:style-name="P29"><draw:frame draw:style-name="fr1" draw:name="Frame1" text:anchor-type="paragraph" svg:x="2.3154in" svg:y="1.3799in" svg:width="4.8016in" draw:z-index="1"><draw:text-box fo:min-height="2.1409in"><text:p text:style-name="Frame_20_contents"><draw:custom-shape text:anchor-type="paragraph" draw:z-index="2" draw:name="Shape3" draw:style-name="gr1" draw:text-style-name="P138" svg:width="2.1398in" svg:height="2.065in" svg:x="0.1866in" svg:y="0.0634in"><text:p text:style-name="P137"><text:span text:style-name="T175">Professional</text:span> <text:line-break/>Learning <text:line-break/>Communit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2" draw:style-name="gr2" draw:text-style-name="P139" svg:width="1.3634in" svg:height="1.6933in" svg:x="3.2457in" svg:y="0.1102in"><text:p>Karnataka </text:p><text:p>Open</text:p><text:p>Educational </text:p><text:p>Resour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6" draw:style-name="gr3" draw:text-style-name="P139" svg:width="1.0795in" svg:height="0.7295in" svg:x="1.0492in" svg:y="1.1126in"><text:p text:style-name="P140">Core <text:line-break/>OER <text:line-break/>grou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7" draw:style-name="gr4" draw:text-style-name="P141" svg:width="1.676in" svg:height="0.0858in" svg:x="1.8346in" svg:y="0.335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name="Shape8" draw:style-name="gr5" draw:text-style-name="P142" svg:width="1.4587in" svg:height="0.076in" svg:x="2.0236in" svg:y="1.5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During the <text:span text:style-name="T144">implementation of this program, </text:span>the paucity of contextual materials for high school teaching of mathematics, science and social science, <text:span text:style-name="T144">was noted by the teachers, DSERT and the RMSA. </text:span>This was especially acute <text:span text:style-name="T166">in the context of the newly revised textbooks. <text:s/>On the other hand, members in the PLC were sharing resources – both accessed from the web as well as created by them for use in their classrooms. <text:s/>It was felt that these resources could be reviewed, organized and published to serve as resources to supplement and complement the textbooks. <text:s/></text:span></text:p>
      <text:p text:style-name="P29"><text:span text:style-name="T166">The DSERT, therefore, began </text:span>the Karnataka Open Educational Resources <text:s/>(KOER) project, <text:span text:style-name="T144">in July 2013, </text:span>in partnership with IT for Change, <text:span text:style-name="T144">to create a repository of Open Educational Resources. <text:s/>The vision for the repository was that it was to be </text:span><text:span text:style-name="T100">“for the teachers, by the teachers and of the teachers”</text:span><text:span text:style-name="T144">. <text:s/></text:span></text:p>
      <text:p text:style-name="P30"><text:span text:style-name="T144">A core group of 67 teachers – from mathematics, science and social sciences – was formed and they were trained in the access, creation, review, publishing on the KOER portal. <text:s/></text:span>KOER contains more than 7,000 web page resources and 4,000 files and has had more than 5 million web views.</text:p>
      <text:h text:style-name="P127" text:outline-level="1"><text:bookmark-start text:name="__RefHeading___Toc4971_1972747166"/>Objective of this study<text:bookmark-end text:name="__RefHeading___Toc4971_1972747166"/></text:h>
      <text:p text:style-name="P12">This paper attempts to examine the following questions:</text:p>
      <text:list xml:id="list494370597485513128" text:style-name="L2">
        <text:list-item>
          <text:p text:style-name="P106"><text:span text:style-name="T127">What is the role of </text:span>a PLC <text:span text:style-name="T127">in</text:span> OER adoption<text:note text:id="ftn11" text:note-class="footnote"><text:note-citation>11</text:note-citation><text:note-body><text:p text:style-name="P84">We use the term ‘adoption’ in a broad manner to include access, creation, revision, <text:span text:style-name="T118">sharing</text:span> and use.</text:p></text:note-body></text:note>?</text:p>
        </text:list-item>
        <text:list-item>
          <text:p text:style-name="P107">What is the <text:span text:style-name="T128">nature of the </text:span>dialectic between a <text:span text:style-name="T117">core </text:span>group and PLC and <text:span text:style-name="T129">what is the impact, if any, of this on </text:span>OER adoption? </text:p>
        </text:list-item>
      </text:list>
      <text:h text:style-name="Heading_20_1" text:outline-level="1"><text:bookmark-start text:name="__RefHeading___Toc19252_663672711"/><text:soft-page-break/>Methodology<text:bookmark-end text:name="__RefHeading___Toc19252_663672711"/></text:h>
      <text:p text:style-name="P13">This study is based on the programmatic and action research work undertaken by the authors <text:span text:style-name="T130">between </text:span>June 2013 – <text:span text:style-name="T145">May 2016</text:span>. <text:span text:style-name="T130">It </text:span>is based on analysis of mails shared in the <text:span text:style-name="T174">PLC</text:span><text:note text:id="ftn12" text:note-class="footnote"><text:note-citation>12</text:note-citation><text:note-body><text:p text:style-name="P83">The mailing-list was a google group, this is accessible at <text:a xlink:type="simple" xlink:href="https://groups.google.com/forum/#!forum/mathssciencestf" text:style-name="Internet_20_link" text:visited-style-name="Visited_20_Internet_20_Link">https://groups.google.com/forum/#!forum/mathssciencestf</text:a> </text:p></text:note-body></text:note>, focused group discussions conducted among the OER core group <text:span text:style-name="T167">members</text:span>, key informant interviews conducted with selected teachers, case study conducted of the STF program and the practitioners’ own reflections as action researchers. <text:span text:style-name="T149">The mathematics and science subject forum was taken up for this analysis. <text:s/>The number of core group teachers was 44, whereas the number of PLC members increased as the Subject Teacher Forum program continued.</text:span></text:p>
      <text:h text:style-name="Heading_20_2" text:outline-level="2"><text:bookmark-start text:name="__RefHeading___Toc4983_1993471712"/>Email analysis<text:bookmark-end text:name="__RefHeading___Toc4983_1993471712"/></text:h>
      <text:p text:style-name="P38">The email analyses was done in three ways:</text:p>
      <text:list xml:id="list4835533708537821849" text:style-name="L3">
        <text:list-item>
          <text:p text:style-name="P108"><text:span text:style-name="T167">T</text:span>he headers of all emails sent to the mailing lists (comprising select data elements such as sender, receiver, date-­time, subject line, attachment status, word count and thread, see image below) were downloaded for all mails on the lists. <text:s/>Once the data was captured in a spreadsheet, email headers were analysed using the LibreOffice Calc in order to obtain summary statistics on total emails sent in a month (across all months), number of mails sent by each teacher, number of mail threads etc. The headers of all emails sent by COA <text:s/>teachers was identified using shell scripts, and were analysed for the study period from June 2011 – May 2016. The collected <text:span text:style-name="T159">‘mail header’ information from the google groups </text:span>was <text:span text:style-name="T159">analysed using LibreOffice Calc Pivot table function. <text:s/>This gave us basic information about the number of posts, number of originating mails, threaded responses, the number of mails with attachments and so on. <text:s/></text:span></text:p>
        </text:list-item>
        <text:list-item>
          <text:p text:style-name="P109">We processed the actual emails for the period June 2013 – <text:span text:style-name="T120">Decemb</text:span>er 2016 using the Watson <text:span text:style-name="T121">big data </text:span>analytics software of IBM and the SPSS data modeller, working with a team from IBM analytics <text:span text:style-name="T158">to determine large macro-trends in conversations.</text:span></text:p>
        </text:list-item>
        <text:list-item>
          <text:p text:style-name="P110">We also studied individual emails <text:span text:style-name="T32">conversations in the </text:span><text:span text:style-name="T36">forum</text:span><text:span text:style-name="T32"> for a 2-week period in August 2014. <text:s/></text:span><text:span text:style-name="T40">Each mail was studied (323 emails) and analyzed in terms of </text:span><text:span text:style-name="T41">the type of </text:span><text:span text:style-name="T40">content, the </text:span><text:span text:style-name="T41">format of resource shared and whether the resource was shared as OER or not. <text:s/></text:span><text:span text:style-name="T42">Actual analysis was recorded done in a spreadsheet, by recording the analytical values for the different analysis parameters for each email, obtained from the email headers file. This analysis was done manually by studying each mail in the Thunderbird client</text:span></text:p>
        </text:list-item>
      </text:list>
      <text:h text:style-name="P132" text:outline-level="2"><text:bookmark-start text:name="__RefHeading___Toc4985_1993471712"/><text:soft-page-break/>Focused Group Discussions<text:bookmark-end text:name="__RefHeading___Toc4985_1993471712"/></text:h>
      <text:p text:style-name="P63">During the workshops on OER creation with the core group teachers, focused group discussions (FGD) were used to capture teachers’ experiences and expectations around OER creation and revision as well as their perspectives on Teacher Professional Development. The FGD was also used to explore the connection between the PLC and the core group processes for OER creation. <text:s/></text:p>
      <text:p text:style-name="P62">The discussions were documented as a mind map utilising the Freemind free software application. The mind <text:span text:style-name="T160">map was projected during the discussions, so that participants could see the points being recorded as they were being discussed. Discussions were also audio-­recorded to support the analysis process. The record of the discussions (mind map and audio recordings) were analysed by the authors, and grouped on the basis of pre­identified themes for discussion. Within each theme of discussion, the comments made by the teachers was recorded.</text:span></text:p>
      <text:h text:style-name="P128" text:outline-level="1"><text:bookmark-start text:name="__RefHeading___Toc19254_663672711"/>Findings<text:bookmark-end text:name="__RefHeading___Toc19254_663672711"/></text:h>
      <text:h text:style-name="P133" text:outline-level="2"><text:bookmark-start text:name="__RefHeading___Toc19256_663672711"/>Digital resource creation process <text:bookmark-end text:name="__RefHeading___Toc19256_663672711"/></text:h>
      <text:p text:style-name="Text_20_body">Traditionally, resource creation has been a specialized activity taken up by a few teachers, and often in a centralized manner. <text:s/>The actual development of the resources, the dissemination and the training are all conducted by a small core group. <text:s/>Underlying this process is a concern for good quality materials that can be made available to all teachers and students. <text:s/><text:span text:style-name="T74">Resource material creation and textbook development are often regarded as special roles and do present a career progression for the otherwise flat professional trajectory for many teachers.</text:span></text:p>
      <text:p text:style-name="P35"><text:span text:style-name="T149">O</text:span>ne of the earliest behavio<text:span text:style-name="T131">u</text:span>rs we have observed in the PLC is that soon after the teachers have become members of the PLC, they are very eager to <text:span text:style-name="T119">create and </text:span>share materials created using the multiple tools that they have learnt. <text:s/>They share<text:span text:style-name="T149">d</text:span> web resources, self-created resources or resources otherwise made available to them through the education department. <text:s/><text:span text:style-name="T75">Through their introduction to multiple resource creation tools, teachers’ conception of what a resource can be seemed to have undergone a change. </text:span></text:p>
      <text:p text:style-name="P44">To understand how important the PLC is for OER use, we studied the mails shared by the teachers in the PLC from June the beginning of the program (June 2011 ) until May 2016. <text:s/>The number of mails, sent with attachments was analyzed. An attachment to a mail was considered a proxy to a resource shared along with the mail. <text:s text:c="2"/>The following tables summarizes the results of this analysis. </text:p>
      <text:p text:style-name="P35"><text:span text:style-name="T122">Table 1 - </text:span><text:span text:style-name="T88">Mails with attachments (resources) sent to list by core </text:span><text:span text:style-name="T89">group </text:span><text:span text:style-name="T88">and </text:span><text:span text:style-name="T89">other </text:span><text:span text:style-name="T88">members</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36">Particulars</text:p>
          </table:table-cell>
          <table:table-cell table:style-name="Table4.A1" office:value-type="string">
            <text:p text:style-name="P37">Core group members</text:p>
          </table:table-cell>
          <table:table-cell table:style-name="Table4.A1" office:value-type="string">
            <text:p text:style-name="P37">Other PLC members</text:p>
          </table:table-cell>
          <table:table-cell table:style-name="Table4.D1" office:value-type="string">
            <text:p text:style-name="P37">Total mails</text:p>
          </table:table-cell>
        </table:table-row>
        <table:table-row table:style-name="Table4.1">
          <table:table-cell table:style-name="Table4.A2" office:value-type="string">
            <text:p text:style-name="P35">Mails without attachment</text:p>
          </table:table-cell>
          <table:table-cell table:style-name="Table4.B2" office:value-type="float" office:value="3627">
            <text:p text:style-name="P33">3,627</text:p>
          </table:table-cell>
          <table:table-cell table:style-name="Table4.B2" office:value-type="float" office:value="42847">
            <text:p text:style-name="P33">42,847</text:p>
          </table:table-cell>
          <table:table-cell table:style-name="Table4.D2" office:value-type="float" office:value="46474">
            <text:p text:style-name="P33">46,474</text:p>
          </table:table-cell>
        </table:table-row>
        <table:table-row table:style-name="Table4.1">
          <table:table-cell table:style-name="Table4.A2" office:value-type="string">
            <text:p text:style-name="P35"><text:span text:style-name="T123">Mails with</text:span> attachment</text:p>
          </table:table-cell>
          <table:table-cell table:style-name="Table4.B2" office:value-type="float" office:value="1271">
            <text:p text:style-name="P33">1,271</text:p>
          </table:table-cell>
          <table:table-cell table:style-name="Table4.B2" office:value-type="float" office:value="10040">
            <text:p text:style-name="P33">10,040</text:p>
          </table:table-cell>
          <table:table-cell table:style-name="Table4.D2" office:value-type="float" office:value="11311">
            <text:p text:style-name="P33">11,311</text:p>
          </table:table-cell>
        </table:table-row>
        <table:table-row table:style-name="Table4.1">
          <table:table-cell table:style-name="Table4.A2" office:value-type="string">
            <text:p text:style-name="P35">Total emails</text:p>
          </table:table-cell>
          <table:table-cell table:style-name="Table4.B2" office:value-type="float" office:value="4898">
            <text:p text:style-name="P33">4,898</text:p>
          </table:table-cell>
          <table:table-cell table:style-name="Table4.B2" office:value-type="float" office:value="52887">
            <text:p text:style-name="P33">52,887</text:p>
          </table:table-cell>
          <table:table-cell table:style-name="Table4.D2" office:value-type="float" office:value="57785">
            <text:p text:style-name="P33">57,785</text:p>
          </table:table-cell>
        </table:table-row>
        <table:table-row table:style-name="Table4.1">
          <table:table-cell table:style-name="Table4.A2" office:value-type="string">
            <text:p text:style-name="P35">% <text:span text:style-name="T124">e</text:span>mails with attachments </text:p>
          </table:table-cell>
          <table:table-cell table:style-name="Table4.A2" office:value-type="string">
            <text:p text:style-name="P33">2<text:span text:style-name="T149">6%</text:span></text:p>
          </table:table-cell>
          <table:table-cell table:style-name="Table4.A2" office:value-type="string">
            <text:p text:style-name="P33">1<text:span text:style-name="T149">9%</text:span></text:p>
          </table:table-cell>
          <table:table-cell table:style-name="Table4.D5" office:value-type="string">
            <text:p text:style-name="P37">20%</text:p>
          </table:table-cell>
        </table:table-row>
      </table:table>
      <text:p text:style-name="Footnote">Source – Maths Science teachers google group (mailing list) : <text:span text:style-name="T157">Mails from June2011 – May 2016</text:span></text:p>
      <text:p text:style-name="P68"/>
      <text:p text:style-name="P73"><text:span text:style-name="T85">Table </text:span><text:span text:style-name="T86">2</text:span><text:span text:style-name="T85"> - </text:span><text:span text:style-name="T82">Percentage of mails with attachments </text:span><text:span text:style-name="T85">sent to list by core group and other members – year wise</text:span></text:p>
      <text:p text:style-name="P71"/>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column table:style-name="Table11.G"/>
        <table:table-column table:style-name="Table11.H"/>
        <table:table-row table:style-name="Table11.1">
          <table:table-cell table:style-name="Table11.A1" office:value-type="string">
            <text:p text:style-name="P72">Proportion of mails with resources</text:p>
          </table:table-cell>
          <table:table-cell table:style-name="Table11.A1" office:value-type="string">
            <text:p text:style-name="P69">2011</text:p>
          </table:table-cell>
          <table:table-cell table:style-name="Table11.A1" office:value-type="string">
            <text:p text:style-name="P69">2012</text:p>
          </table:table-cell>
          <table:table-cell table:style-name="Table11.A1" office:value-type="string">
            <text:p text:style-name="P69">2013</text:p>
          </table:table-cell>
          <table:table-cell table:style-name="Table11.A1" office:value-type="string">
            <text:p text:style-name="P69">2014</text:p>
          </table:table-cell>
          <table:table-cell table:style-name="Table11.A1" office:value-type="string">
            <text:p text:style-name="P69">2015</text:p>
          </table:table-cell>
          <table:table-cell table:style-name="Table11.A1" office:value-type="string">
            <text:p text:style-name="P69">2016</text:p>
          </table:table-cell>
          <table:table-cell table:style-name="Table11.H1" office:value-type="string">
            <text:p text:style-name="P67">Total Result</text:p>
          </table:table-cell>
        </table:table-row>
        <table:table-row table:style-name="Table11.1">
          <table:table-cell table:style-name="Table11.A2" office:value-type="string">
            <text:p text:style-name="Text_20_body">Core group <text:span text:style-name="T146">members </text:span></text:p>
          </table:table-cell>
          <table:table-cell table:style-name="Table11.A2" office:value-type="string">
            <text:p text:style-name="P69">22% </text:p>
          </table:table-cell>
          <table:table-cell table:style-name="Table11.A2" office:value-type="string">
            <text:p text:style-name="P69">25%</text:p>
          </table:table-cell>
          <table:table-cell table:style-name="Table11.A2" office:value-type="string">
            <text:p text:style-name="P69">53%</text:p>
          </table:table-cell>
          <table:table-cell table:style-name="Table11.A2" office:value-type="string">
            <text:p text:style-name="P75">34%</text:p>
          </table:table-cell>
          <table:table-cell table:style-name="Table11.A2" office:value-type="string">
            <text:p text:style-name="P69">2<text:span text:style-name="T147">7%</text:span></text:p>
          </table:table-cell>
          <table:table-cell table:style-name="Table11.A2" office:value-type="string">
            <text:p text:style-name="P69">31%</text:p>
          </table:table-cell>
          <table:table-cell table:style-name="Table11.H2" office:value-type="string">
            <text:p text:style-name="P69">3<text:span text:style-name="T148">2%</text:span></text:p>
          </table:table-cell>
        </table:table-row>
        <table:table-row table:style-name="Table11.1">
          <table:table-cell table:style-name="Table11.A2" office:value-type="string">
            <text:p text:style-name="P31">Other PLC members</text:p>
          </table:table-cell>
          <table:table-cell table:style-name="Table11.A2" office:value-type="string">
            <text:p text:style-name="P69">31%</text:p>
          </table:table-cell>
          <table:table-cell table:style-name="Table11.A2" office:value-type="string">
            <text:p text:style-name="P69">22%</text:p>
          </table:table-cell>
          <table:table-cell table:style-name="Table11.A2" office:value-type="string">
            <text:p text:style-name="P69">30%</text:p>
          </table:table-cell>
          <table:table-cell table:style-name="Table11.A2" office:value-type="string">
            <text:p text:style-name="P69">22%</text:p>
          </table:table-cell>
          <table:table-cell table:style-name="Table11.A2" office:value-type="string">
            <text:p text:style-name="P69">18%</text:p>
          </table:table-cell>
          <table:table-cell table:style-name="Table11.A2" office:value-type="string">
            <text:p text:style-name="P69">1<text:span text:style-name="T148">1%</text:span></text:p>
          </table:table-cell>
          <table:table-cell table:style-name="Table11.H2" office:value-type="string">
            <text:p text:style-name="P69">1<text:span text:style-name="T148">9%</text:span></text:p>
          </table:table-cell>
        </table:table-row>
        <table:table-row table:style-name="Table11.1">
          <table:table-cell table:style-name="Table11.A2" office:value-type="string">
            <text:p text:style-name="P34">Overall mails</text:p>
          </table:table-cell>
          <table:table-cell table:style-name="Table11.A2" office:value-type="string">
            <text:p text:style-name="P74">30%</text:p>
          </table:table-cell>
          <table:table-cell table:style-name="Table11.A2" office:value-type="string">
            <text:p text:style-name="P74">23%</text:p>
          </table:table-cell>
          <table:table-cell table:style-name="Table11.A2" office:value-type="string">
            <text:p text:style-name="P74">33%</text:p>
          </table:table-cell>
          <table:table-cell table:style-name="Table11.A2" office:value-type="string">
            <text:p text:style-name="P74">23%</text:p>
          </table:table-cell>
          <table:table-cell table:style-name="Table11.A2" office:value-type="string">
            <text:p text:style-name="P74">18%</text:p>
          </table:table-cell>
          <table:table-cell table:style-name="Table11.A2" office:value-type="string">
            <text:p text:style-name="P74">11%</text:p>
          </table:table-cell>
          <table:table-cell table:style-name="Table11.H2" office:value-type="string">
            <text:p text:style-name="P74">20%</text:p>
          </table:table-cell>
        </table:table-row>
      </table:table>
      <text:p text:style-name="P86">Source – Maths Science teachers google group (mailing list) : <text:span text:style-name="T157">Mails from June2011 – May 2016</text:span></text:p>
      <text:p text:style-name="P86"/>
      <text:p text:style-name="P11">The following things emerge from these data:</text:p>
      <text:list xml:id="list7384807238138771510" text:style-name="L4">
        <text:list-item>
          <text:p text:style-name="P111">With the exception of 2011, in all the years, the percentage <text:span text:style-name="T149">of</text:span> resource mails shared (as a % of mails they sent) is more for the core group than other PLC members.</text:p>
        </text:list-item>
        <text:list-item>
          <text:p text:style-name="P112">With the exception o<text:span text:style-name="T150">f 2011, in all the years, t</text:span>he percentage of mails with attachments, sent by the core group is higher than the average for the overall PLC mails</text:p>
        </text:list-item>
        <text:list-item>
          <text:p text:style-name="P113"><text:span text:style-name="T150">Of the mails overall, w</text:span>e can see from the table above that nearly one out of five mails had an attachment, which would be a resource (accessed or created and) shared by the teacher. For the core group, it was one out of <text:span text:style-name="T132">three</text:span> mails which had an attachment. </text:p>
        </text:list-item>
      </text:list>
      <text:p text:style-name="P44">While all the teachers in the PLC had been introduced to digital methods of resource creation, the mails and sharing by the core group was more than the PLC. <text:s/>Their contribution in the PLC and their participation and experiences of OER creation seemed to be mutually reinforcing each other. <text:s/></text:p>
      <text:h text:style-name="Heading_20_3" text:outline-level="3"><text:bookmark-start text:name="__RefHeading___Toc19258_663672711"/>Analysis of emails shared in the PLC<text:bookmark-end text:name="__RefHeading___Toc19258_663672711"/></text:h>
      <text:p text:style-name="P8">To understand how the PLC can support OER creation, we studied <text:span text:style-name="T150">323</text:span> email conversations in the PLC for a 2-week period in August 2014. <text:s/>This time period was chosen as it was the beginning of the academic year and one year after the OER creation process began with the core group. <text:s/>In this section, we describe the kinds of emails shared, the format of resources shared and the understanding of OER evidenced by the PLC conversations. <text:s/><text:span text:style-name="T151">Mail header analysis was also done to understand mailing and response patterns.</text:span></text:p>
      <text:h text:style-name="P122" text:outline-level="4"><text:bookmark-start text:name="__RefHeading___Toc4211_1818222027"/><text:soft-page-break/>Responding to mails <text:bookmark-end text:name="__RefHeading___Toc4211_1818222027"/></text:h>
      <text:p text:style-name="P24">Table <text:span text:style-name="T168">3</text:span> – Details of number of mail threads </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ext_20_body">Responses to threads</text:p>
          </table:table-cell>
          <table:table-cell table:style-name="Table10.A1" office:value-type="string">
            <text:p text:style-name="Text_20_body"><text:span text:style-name="T151">N</text:span>umber of threads with 1 or more response</text:p>
          </table:table-cell>
          <table:table-cell table:style-name="Table10.A1" office:value-type="string">
            <text:p text:style-name="Text_20_body">number of threads with 0 response</text:p>
          </table:table-cell>
          <table:table-cell table:style-name="Table10.A1" office:value-type="string">
            <text:p text:style-name="Text_20_body">Total threads initiated</text:p>
          </table:table-cell>
          <table:table-cell table:style-name="Table10.E1" office:value-type="string">
            <text:p text:style-name="Text_20_body">% threads responded to</text:p>
          </table:table-cell>
        </table:table-row>
        <table:table-row table:style-name="Table10.2">
          <table:table-cell table:style-name="Table10.A2" office:value-type="string">
            <text:p text:style-name="Text_20_body">Core group</text:p>
          </table:table-cell>
          <table:table-cell table:style-name="Table10.A2" office:value-type="string">
            <text:p text:style-name="Text_20_body">2110</text:p>
          </table:table-cell>
          <table:table-cell table:style-name="Table10.A2" office:value-type="string">
            <text:p text:style-name="Text_20_body">0</text:p>
          </table:table-cell>
          <table:table-cell table:style-name="Table10.A2" office:value-type="string">
            <text:p text:style-name="Text_20_body">2110</text:p>
          </table:table-cell>
          <table:table-cell table:style-name="Table10.E2" office:value-type="string">
            <text:p text:style-name="Text_20_body">100</text:p>
          </table:table-cell>
        </table:table-row>
        <table:table-row table:style-name="Table10.2">
          <table:table-cell table:style-name="Table10.A2" office:value-type="string">
            <text:p text:style-name="P40">Other PLC members </text:p>
          </table:table-cell>
          <table:table-cell table:style-name="Table10.A2" office:value-type="string">
            <text:p text:style-name="Text_20_body">15807</text:p>
          </table:table-cell>
          <table:table-cell table:style-name="Table10.A2" office:value-type="string">
            <text:p text:style-name="Text_20_body">2174</text:p>
          </table:table-cell>
          <table:table-cell table:style-name="Table10.A2" office:value-type="string">
            <text:p text:style-name="Text_20_body">17981</text:p>
          </table:table-cell>
          <table:table-cell table:style-name="Table10.E2" office:value-type="string">
            <text:p text:style-name="Text_20_body">87.91</text:p>
          </table:table-cell>
        </table:table-row>
        <table:table-row table:style-name="Table10.2">
          <table:table-cell table:style-name="Table10.A2" office:value-type="string">
            <text:p text:style-name="P42">Overall</text:p>
          </table:table-cell>
          <table:table-cell table:style-name="Table10.A2" office:value-type="string">
            <text:p text:style-name="Text_20_body">17917</text:p>
          </table:table-cell>
          <table:table-cell table:style-name="Table10.A2" office:value-type="string">
            <text:p text:style-name="Text_20_body">2174</text:p>
          </table:table-cell>
          <table:table-cell table:style-name="Table10.A2" office:value-type="string">
            <text:p text:style-name="Text_20_body">20091</text:p>
          </table:table-cell>
          <table:table-cell table:style-name="Table10.E2" office:value-type="string">
            <text:p text:style-name="Text_20_body">89.18</text:p>
          </table:table-cell>
        </table:table-row>
      </table:table>
      <text:p text:style-name="P87">Source – Maths Science teachers google group (mailing list) : <text:span text:style-name="T157">Mails from June 2013 – May 2016</text:span></text:p>
      <text:p text:style-name="P87"/>
      <text:p text:style-name="P39"><text:span text:style-name="T34">It </text:span><text:span text:style-name="T43">appears </text:span><text:span text:style-name="T34">that almost 90% of the mails were responded to. In case of the core group, this was 100%.</text:span><text:span text:style-name="T33"> <text:s/></text:span></text:p>
      <text:p text:style-name="P41"><text:span text:style-name="T80">While the above data captures conversations for the entire period, a similar exercise was also done for the smaller sample of 323 mails that were analyzed. <text:s/></text:span><text:span text:style-name="T78">Of the 323 emails analyzed, 56 emails were responded to. The </text:span><text:span text:style-name="T79">focus here was on </text:span><text:span text:style-name="T78">understand</text:span><text:span text:style-name="T79">ing </text:span><text:span text:style-name="T78">mailing habits in terms of (i) tracking a thread and responding, (ii) forwarding threads and commenting and (iii) responding/ acknowledging mails that have been found useful. <text:s text:c="2"/>163 emails were single posts. <text:s/>Of the 56 emails that had a response, 33 emails had a single response, 14 emails had three responses and 4 emails had 4 responses and remaining 5 had more than 4 responses. <text:s/></text:span></text:p>
      <text:h text:style-name="P123" text:outline-level="4"><text:bookmark-start text:name="__RefHeading___Toc4931_1009653035"/>Kinds of mails<text:bookmark-end text:name="__RefHeading___Toc4931_1009653035"/></text:h>
      <text:p text:style-name="P6"><text:span text:style-name="T76">Teachers </text:span><text:span text:style-name="T77">were </text:span>sharing a variety of resources – accessed from the internet as well as those created by themselves. Resources shared including lesson notes, web resources (web links), pictures and videos for demonstration and discussion, videos created by themselves/ their school, Geogebra<text:note text:id="ftn13" text:note-class="footnote"><text:note-citation>13</text:note-citation><text:note-body><text:p text:style-name="Footnote">Tool used for creating animations and lesson plans for mathematics, see http://www.geogebra.org/cms/en/</text:p></text:note-body></text:note> files, general articles of interest on education, new software applications, critiques of examination papers/ patterns and blue prints, school-wise notes of lessons, preparatory examination papers and assessment formats and approaches for assessments. </text:p>
      <text:p text:style-name="P23">Table <text:span text:style-name="T173">4</text:span>- <text:span text:style-name="T81">Nature of </text:span>emails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Kind of email</text:p>
          </table:table-cell>
          <table:table-cell table:style-name="Table2.B1" office:value-type="string">
            <text:p text:style-name="Text_20_body">Number</text:p>
          </table:table-cell>
          <table:table-cell table:style-name="Table2.C1" office:value-type="string">
            <text:p text:style-name="P45">Percentage%</text:p>
          </table:table-cell>
        </table:table-row>
        <table:table-row table:style-name="Table2.1">
          <table:table-cell table:style-name="Table2.A2" office:value-type="string">
            <text:p text:style-name="Text_20_body">Sharing resources – Created</text:p>
          </table:table-cell>
          <table:table-cell table:style-name="Table2.B2" office:value-type="string">
            <text:p text:style-name="Text_20_body">65</text:p>
          </table:table-cell>
          <table:table-cell table:style-name="Table2.C2" office:value-type="string">
            <text:p text:style-name="Text_20_body">18.2</text:p>
          </table:table-cell>
        </table:table-row>
        <table:table-row table:style-name="Table2.1">
          <table:table-cell table:style-name="Table2.A3" office:value-type="string">
            <text:p text:style-name="Text_20_body">Asking for help/ seek information</text:p>
          </table:table-cell>
          <table:table-cell table:style-name="Table2.B3" office:value-type="string">
            <text:p text:style-name="Text_20_body">61</text:p>
          </table:table-cell>
          <table:table-cell table:style-name="Table2.C3" office:value-type="string">
            <text:p text:style-name="Text_20_body">17.1 </text:p>
          </table:table-cell>
        </table:table-row>
        <table:table-row table:style-name="Table2.1">
          <table:table-cell table:style-name="Table2.A4" office:value-type="string">
            <text:p text:style-name="Text_20_body">Responding to question</text:p>
          </table:table-cell>
          <table:table-cell table:style-name="Table2.B4" office:value-type="string">
            <text:p text:style-name="Text_20_body">47</text:p>
          </table:table-cell>
          <table:table-cell table:style-name="Table2.C4" office:value-type="string">
            <text:p text:style-name="Text_20_body">13.2 </text:p>
          </table:table-cell>
        </table:table-row>
        <table:table-row table:style-name="Table2.1">
          <table:table-cell table:style-name="Table2.A5" office:value-type="string">
            <text:p text:style-name="Text_20_body">Sharing resources – Accessed</text:p>
          </table:table-cell>
          <table:table-cell table:style-name="Table2.B5" office:value-type="string">
            <text:p text:style-name="Text_20_body">41</text:p>
          </table:table-cell>
          <table:table-cell table:style-name="Table2.C5" office:value-type="string">
            <text:p text:style-name="Text_20_body">11.5 </text:p>
          </table:table-cell>
        </table:table-row>
        <table:table-row table:style-name="Table2.1">
          <table:table-cell table:style-name="Table2.A6" office:value-type="string">
            <text:p text:style-name="Text_20_body">Sharing resources – Revised</text:p>
          </table:table-cell>
          <table:table-cell table:style-name="Table2.B6" office:value-type="string">
            <text:p text:style-name="Text_20_body">4</text:p>
          </table:table-cell>
          <table:table-cell table:style-name="Table2.C6" office:value-type="string">
            <text:p text:style-name="Text_20_body">1.1</text:p>
          </table:table-cell>
        </table:table-row>
        <table:table-row table:style-name="Table2.1">
          <table:table-cell table:style-name="Table2.A7" office:value-type="string">
            <text:p text:style-name="Text_20_body">Feedback on resources</text:p>
          </table:table-cell>
          <table:table-cell table:style-name="Table2.B7" office:value-type="string">
            <text:p text:style-name="Text_20_body">23</text:p>
          </table:table-cell>
          <table:table-cell table:style-name="Table2.C7" office:value-type="string">
            <text:p text:style-name="Text_20_body">6.4 <text:soft-page-break/></text:p>
          </table:table-cell>
        </table:table-row>
        <table:table-row table:style-name="Table2.1">
          <table:table-cell table:style-name="Table2.A8" office:value-type="string">
            <text:p text:style-name="Text_20_body">Sharing ideas</text:p>
          </table:table-cell>
          <table:table-cell table:style-name="Table2.B8" office:value-type="string">
            <text:p text:style-name="Text_20_body">17</text:p>
          </table:table-cell>
          <table:table-cell table:style-name="Table2.C8" office:value-type="string">
            <text:p text:style-name="Text_20_body">4.8 </text:p>
          </table:table-cell>
        </table:table-row>
        <table:table-row table:style-name="Table2.1">
          <table:table-cell table:style-name="Table2.A9" office:value-type="string">
            <text:p text:style-name="Text_20_body">Thank you email</text:p>
          </table:table-cell>
          <table:table-cell table:style-name="Table2.B9" office:value-type="string">
            <text:p text:style-name="Text_20_body">14</text:p>
          </table:table-cell>
          <table:table-cell table:style-name="Table2.C9" office:value-type="string">
            <text:p text:style-name="Text_20_body">3.9 </text:p>
          </table:table-cell>
        </table:table-row>
        <table:table-row table:style-name="Table2.1">
          <table:table-cell table:style-name="Table2.A11" office:value-type="string">
            <text:p text:style-name="P46">Sharing resources – departmental</text:p>
          </table:table-cell>
          <table:table-cell table:style-name="Table2.B11" office:value-type="string">
            <text:p text:style-name="P45">13</text:p>
          </table:table-cell>
          <table:table-cell table:style-name="Table2.C11" office:value-type="string">
            <text:p text:style-name="P45">3.6</text:p>
          </table:table-cell>
        </table:table-row>
        <table:table-row table:style-name="Table2.1">
          <table:table-cell table:style-name="Table2.A11" office:value-type="string">
            <text:p text:style-name="Text_20_body">Others</text:p>
          </table:table-cell>
          <table:table-cell table:style-name="Table2.B11" office:value-type="string">
            <text:p text:style-name="Text_20_body">72</text:p>
          </table:table-cell>
          <table:table-cell table:style-name="Table2.C11" office:value-type="string">
            <text:p text:style-name="Text_20_body">20.2 </text:p>
          </table:table-cell>
        </table:table-row>
        <table:table-row table:style-name="Table2.1">
          <table:table-cell table:style-name="Table2.A12" office:value-type="string">
            <text:p text:style-name="Text_20_body">Total</text:p>
          </table:table-cell>
          <table:table-cell table:style-name="Table2.B12" office:value-type="string">
            <text:p text:style-name="Text_20_body">357</text:p>
          </table:table-cell>
          <table:table-cell table:style-name="Table2.C12" office:value-type="string">
            <text:p text:style-name="Text_20_body">100.0 </text:p>
          </table:table-cell>
        </table:table-row>
      </table:table>
      <text:p text:style-name="P88">Source – Maths Science teachers google group (mailing list) : <text:span text:style-name="T157">Mails for the first 2 weeks in August 2014</text:span></text:p>
      <text:p text:style-name="P25"/>
      <text:p text:style-name="P25"><draw:frame draw:style-name="fr2" draw:name="Image3" text:anchor-type="paragraph" svg:x="-0.0437in" svg:y="-0.139in" svg:width="6.302in" svg:height="3.5417in" draw:z-index="0"><draw:image xlink:href="Pictures/100000000000025D00000154DF7B8B97588501B9.jpg" xlink:type="simple" xlink:show="embed" xlink:actuate="onLoad"/></draw:frame></text:p>
      <text:p text:style-name="P25"/>
      <text:p text:style-name="P25"/>
      <text:p text:style-name="P25"/>
      <text:p text:style-name="P25"/>
      <text:p text:style-name="P25"/>
      <text:p text:style-name="P25"/>
      <text:p text:style-name="P25"/>
      <text:p text:style-name="P88"/>
      <text:p text:style-name="P88">Source – Maths Science teachers google group (mailing list) : <text:span text:style-name="T157">Mails for the first 2 weeks in August 2014</text:span></text:p>
      <text:p text:style-name="P88"/>
      <text:p text:style-name="P10"><text:span text:style-name="T82">Note</text:span>: <text:s/></text:p>
      <text:p text:style-name="P10">Sometimes, an email could be of more than one kind. <text:s/>It could answer a question as well as share a resource, in which case it has been counted under both. This is the reason why the total is more than 323, the number of emails studied.</text:p>
      <text:p text:style-name="P7">Sharing created resources is the single largest category of emails (65). <text:s text:c="2"/>Mails asking for clarification (seeking help/ information) is the next largest category of emails (61). <text:s/>Teachers respond to questions asked either in an email or by sharing other resources (created/ accessed). Teachers also <text:s/>share feedback and revise resources shared. <text:s/><text:span text:style-name="T75">The number of mails with resources created by teachers is more than the number with accessed resources being shared. This suggests teachers are open to creating resources on their own. </text:span></text:p>
      <text:h text:style-name="Heading_20_4" text:outline-level="4"><text:bookmark-start text:name="__RefHeading___Toc5272_520906967"/><text:soft-page-break/>Format of resources shared<text:bookmark-end text:name="__RefHeading___Toc5272_520906967"/></text:h>
      <text:p text:style-name="P59">In the traditional model of resource creation, text was the predominant format of resource creation. <text:s/>Digital methods, even if they were used, tended to largely be representations of text. <text:s/>This was the outcome perhaps of the first generation of ICT implementation programs which tended to focus on a limited set of applications. <text:s/></text:p>
      <text:p text:style-name="P60"><text:span text:style-name="T169">The PLC members, on the other hand, having been trained in multiple digital tools have been able to more freely imagine resources in multiple formats</text:span><text:span text:style-name="T169"><text:note text:id="ftn14" text:note-class="footnote"><text:note-citation>14</text:note-citation><text:note-body><text:p text:style-name="P80">Prof. Rajaram Sharma, Open Educational Resources: Building Communities and Building Knowledge, Vignettes of selected Asian experiences</text:p></text:note-body></text:note></text:span><text:span text:style-name="T169">. <text:s text:c="2"/>Among the resources shared, t</text:span><text:span text:style-name="T66">ext is the most common format of resources. Geogebra and image files are the second largest category of resources shared. <text:s/></text:span><text:span text:style-name="T67">Strengthened by their knowledge of multiple tools, teachers’ conceptions of resources have expanded to </text:span><text:span text:style-name="T68">documenting classroom processes – field vists, lab work, specimens collected, places visited, etc. <text:s/>As an example, one of the teachers in the PLC whose resources have been uploaded on the OER repository</text:span><text:span text:style-name="T68"><text:note text:id="ftn15" text:note-class="footnote"><text:note-citation>15</text:note-citation><text:note-body><text:p text:style-name="P81">KOER page link</text:p></text:note-body></text:note></text:span><text:span text:style-name="T68">, self recorded the making of a drawing of the human ear along with a voice narration thus creating a resource, mixing in multiple formats (image, video of the image being drawn and the audio of the narration).</text:span></text:p>
      <text:h text:style-name="P124" text:outline-level="4"><text:bookmark-start text:name="__RefHeading___Toc5276_520906967"/>An understanding of the nature of OER<text:bookmark-end text:name="__RefHeading___Toc5276_520906967"/></text:h>
      <text:p text:style-name="P15">While studying the emails, we attempted to determine if teachers were sharing resources consciously as OER (or as non OER<text:span text:style-name="T170">)</text:span>. <text:s/>An explicit OER is where a resource is <text:s/>shared under a liberal license such as the Creative Commons license. <text:s/>We found that the largest number of emails were of resources that were shared without any explicit license. <text:s/>However, based on the analyses of emails, it is clear that teachers have intended to share the<text:span text:style-name="T170">i</text:span>r resources for others to download and use (for re-use) and hence we have categorised such sharing as implicit OER. <text:s/>In many cases, teachers have also explicitly asked for the resource they have shared to be revised and shared back. </text:p>
      <text:p text:style-name="P14">Teachers are implicit in their assumption of sharing their resources as Open Educational Resources as can be seen from the fact that often times an email conversation is a resource (the question, answer and discussion). <text:s/>Very rarely resources are shared explicitly as OERs. For the purposes of this analysis, we have included resources/ links from known OER sources as explicit OERs.</text:p>
      <text:p text:style-name="P43">Table <text:span text:style-name="T173">5 </text:span>- Awareness of OERs</text:p>
      <table:table table:name="Table5" table:style-name="Table5">
        <table:table-column table:style-name="Table5.A"/>
        <table:table-column table:style-name="Table5.B"/>
        <table:table-row table:style-name="Table5.1">
          <table:table-cell table:style-name="Table5.A1" office:value-type="string">
            <text:p text:style-name="Text_20_body">Explicit non-OERs</text:p>
          </table:table-cell>
          <table:table-cell table:style-name="Table5.B1" office:value-type="string">
            <text:p text:style-name="Text_20_body">19</text:p>
          </table:table-cell>
        </table:table-row>
        <table:table-row table:style-name="Table5.2">
          <table:table-cell table:style-name="Table5.A2" office:value-type="string">
            <text:p text:style-name="Text_20_body">Implicit non-OERs</text:p>
          </table:table-cell>
          <table:table-cell table:style-name="Table5.B2" office:value-type="string">
            <text:p text:style-name="Text_20_body">9</text:p>
          </table:table-cell>
        </table:table-row>
        <text:soft-page-break/>
        <table:table-row table:style-name="Table5.2">
          <table:table-cell table:style-name="Table5.A2" office:value-type="string">
            <text:p text:style-name="Text_20_body">Implicit OERs</text:p>
          </table:table-cell>
          <table:table-cell table:style-name="Table5.B2" office:value-type="string">
            <text:p text:style-name="Text_20_body">198</text:p>
          </table:table-cell>
        </table:table-row>
        <table:table-row table:style-name="Table5.2">
          <table:table-cell table:style-name="Table5.A2" office:value-type="string">
            <text:p text:style-name="Text_20_body">Explicit OERs</text:p>
          </table:table-cell>
          <table:table-cell table:style-name="Table5.B2" office:value-type="string">
            <text:p text:style-name="Text_20_body">16</text:p>
          </table:table-cell>
        </table:table-row>
        <table:table-row table:style-name="Table5.2">
          <table:table-cell table:style-name="Table5.A2" office:value-type="string">
            <text:p text:style-name="Text_20_body">Total</text:p>
          </table:table-cell>
          <table:table-cell table:style-name="Table5.B2" office:value-type="string">
            <text:p text:style-name="Text_20_body">242</text:p>
          </table:table-cell>
        </table:table-row>
      </table:table>
      <text:p text:style-name="P89">Source – Maths Science teachers google group (mailing list) : <text:span text:style-name="T157">Mails for the first 2 weeks in August 2014</text:span></text:p>
      <text:p text:style-name="P16"/>
      <text:p text:style-name="P16"><text:span text:style-name="T170">I</text:span>n a textbook culture dominated system, where the state supplies textbooks and materials free of cost, there seems to be an implicit idea that educational resources must be open. <text:s text:c="2"/><text:span text:style-name="T91">Further, there seems to be a belief among teachers, shared during focused group discussions that resources shared online are free to use; an understanding of the copyright principles of OER was not common. <text:s/>This misconception seems to be guiding teachers’ sharing of resources in the PLC, though the intent seems to be making the resource an OER – allowing reuse, seeking feedback to revise and so on. <text:s/>The following email snapshots show examples of such sharing.</text:span></text:p>
      <table:table table:name="Table7" table:style-name="Table7">
        <table:table-column table:style-name="Table7.A"/>
        <table:table-row table:style-name="Table7.1">
          <table:table-cell table:style-name="Table7.A1" office:value-type="string">
            <text:p text:style-name="P92"><draw:frame draw:style-name="fr3" draw:name="Image2" text:anchor-type="paragraph" svg:width="6.6193in" svg:height="0.9902in" draw:z-index="7"><draw:image xlink:href="Pictures/1000000000000553000000CC96D8E734CE9DB683.png" xlink:type="simple" xlink:show="embed" xlink:actuate="onLoad"/></draw:frame></text:p>
          </table:table-cell>
        </table:table-row>
        <table:table-row table:style-name="Table7.1">
          <table:table-cell table:style-name="Table7.A2" office:value-type="string">
            <text:p text:style-name="Text_20_body">This is an email sent by a PLC member asking for resources for a particular purpose. <text:s/>A core group member has responded with a resource; implicit in the sharing is the principle of “reuse-revise-redistribute” of OER. <text:s/></text:p>
          </table:table-cell>
        </table:table-row>
      </table:table>
      <table:table table:name="Table9" table:style-name="Table9">
        <table:table-column table:style-name="Table9.A"/>
        <table:table-row table:style-name="Table9.1">
          <table:table-cell table:style-name="Table9.A1" office:value-type="string">
            <text:p text:style-name="P93"><draw:frame draw:style-name="fr4" draw:name="Image4" text:anchor-type="paragraph" svg:width="6.6193in" svg:height="2.2618in" draw:z-index="8"><draw:image xlink:href="Pictures/100000000000054B000001CF8D51C975B34A8B98.png" xlink:type="simple" xlink:show="embed" xlink:actuate="onLoad"/></draw:frame></text:p>
          </table:table-cell>
        </table:table-row>
        <table:table-row table:style-name="Table9.1">
          <table:table-cell table:style-name="Table9.A2" office:value-type="string">
            <text:p text:style-name="Text_20_body">In this exa<text:span text:style-name="T161">mple, a teacher has pointed out the need for a correction in a resource shared. The core group member has explicitly responded asking the user to “edit” it.</text:span></text:p>
          </table:table-cell>
        </table:table-row>
      </table:table>
      <text:p text:style-name="P70"/>
      <text:h text:style-name="Heading_20_3" text:outline-level="3"><text:bookmark-start text:name="__RefHeading___Toc4933_1009653035"/><text:soft-page-break/><text:span text:style-name="T133">Big data analyses of the </text:span>PLC <text:span text:style-name="T133">mails using Watson</text:span><text:bookmark-end text:name="__RefHeading___Toc4933_1009653035"/></text:h>
      <text:p text:style-name="P26">Analyses of the mailing-list <text:span text:style-name="T171">was done</text:span> using the Watson<text:note text:id="ftn16" text:note-class="footnote"><text:note-citation>16</text:note-citation><text:note-body><text:p text:style-name="P91">https://en.wikipedia.org/wiki/Watson_(computer)</text:p></text:note-body></text:note> analytics software and SPSS data modeller. The entire body of emails <text:span text:style-name="T134">(which is ‘big data’ given the large number of emails) </text:span>for the Mathematics and Science PLC was ‘machine-read’ and analysed using the Watson analytics software, combined with the SPSS data modeller, in collaboration with a team from IBM Watson analytics team.</text:p>
      <text:p text:style-name="Text_20_body">Following are the important observations and analyses from this mail analyses <text:span text:style-name="T156">using Watson:</text:span></text:p>
      <text:list xml:id="list5293768261724132600" text:style-name="L5">
        <text:list-item>
          <text:p text:style-name="P115">Geogebra is the most discussed tool amongst the Maths-Science teachers. <text:span text:style-name="T156">Geogebra is a popular tool for creating mathematics lessons and suggests that conversations are led by resource creation needs and possibilities. <text:s/></text:span></text:p>
        </text:list-item>
        <text:list-item>
          <text:p text:style-name="P115">The type of documents more popularly shared among the teachers are JPG &amp; PNGs, followed by PDF documents. <text:s/><text:span text:style-name="T156">We saw earlier in our sample analysis that text and image are popular formats, though they are sharing <text:s/>resources in other formats as well. Teachers’ familiarity with tools of resource creation seems to determine the format of resources shared. <text:s/></text:span></text:p>
        </text:list-item>
        <text:list-item>
          <text:p text:style-name="P116">Most of the responses <text:span text:style-name="T152">by other PLC members </text:span>to resources express gratitude for the resource shared. <text:s/><text:span text:style-name="T156">A relatively smaller number give detailed feedback. <text:s/>The PLC acknowledges and receives resources, however, the critical review and feedback are more advanced pedagogical processes and will take time to emerge. <text:s/>This process of review and feedback, is in itself a method of teacher development. <text:s text:c="2"/>Here again, the core group teachers have been able to play a larger role in modelling how to give feedback with specific suggestions as seen in the mail below.</text:span></text:p>
        </text:list-item>
      </text:list>
      <table:table table:name="Table12" table:style-name="Table12">
        <table:table-column table:style-name="Table12.A"/>
        <table:table-row>
          <table:table-cell table:style-name="Table12.A1" office:value-type="string">
            <text:p text:style-name="P94"><draw:frame draw:style-name="fr4" draw:name="Image5" text:anchor-type="paragraph" svg:width="6.3811in" svg:height="1.7937in" draw:z-index="9"><draw:image xlink:href="Pictures/100000000000054B0000017D8E45B228B5ED3077.png" xlink:type="simple" xlink:show="embed" xlink:actuate="onLoad"/></draw:frame></text:p>
          </table:table-cell>
        </table:table-row>
        <table:table-row>
          <table:table-cell table:style-name="Table12.A2" office:value-type="string">
            <text:p text:style-name="Text_20_body">A teacher has shared an article he had written in a departmental magazine, <text:span text:style-name="T162">which was met with simple responses of “very nice” and “thank you”. <text:s/>The core group teacher who has responded on top has acknowledged the work, pointed out what was done well and suggested ideas for improvement.</text:span></text:p>
          </table:table-cell>
        </table:table-row>
      </table:table>
      <text:list xml:id="list132746471114925" text:continue-numbering="true" text:style-name="L5">
        <text:list-item>
          <text:p text:style-name="P114"><text:soft-page-break/>Increasing share of mails are being read on mobile devices, <text:span text:style-name="T152">suggesting changes in the way teachers are accessing emails and hence, resources. <text:s/>This will have implications on the kinds of resources that will be created by teachers.</text:span></text:p>
        </text:list-item>
        <text:list-item>
          <text:p text:style-name="P114">Unique senders in maths science mailing list in first five years <text:span text:style-name="T152">is 4738, over the period 2011-16 were studied. The following table gives this data for core group and other PLC members. <text:s/></text:span></text:p>
          <text:p text:style-name="P117">Table <text:span text:style-name="T173">6 –</text:span> <text:span text:style-name="T154">Unique mails in the PLC </text:span></text:p>
        </text:list-item>
      </text:list>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number-columns-repeated="2"/>
        <table:table-row table:style-name="Table6.1">
          <table:table-cell table:style-name="Table6.A1" office:value-type="string">
            <text:p text:style-name="Text_20_body"/>
          </table:table-cell>
          <table:table-cell table:style-name="Table6.A1" office:value-type="string">
            <text:p text:style-name="P32">2011</text:p>
          </table:table-cell>
          <table:table-cell table:style-name="Table6.A1" office:value-type="string">
            <text:p text:style-name="P32">2012</text:p>
          </table:table-cell>
          <table:table-cell table:style-name="Table6.A1" office:value-type="string">
            <text:p text:style-name="P32">2013</text:p>
          </table:table-cell>
          <table:table-cell table:style-name="Table6.A1" office:value-type="string">
            <text:p text:style-name="P32">2014</text:p>
          </table:table-cell>
          <table:table-cell table:style-name="Table6.A1" office:value-type="string">
            <text:p text:style-name="P32">2015</text:p>
          </table:table-cell>
          <table:table-cell table:style-name="Table6.G1" office:value-type="string">
            <text:p text:style-name="P32">2016</text:p>
          </table:table-cell>
        </table:table-row>
        <table:table-row table:style-name="Table6.1">
          <table:table-cell table:style-name="Table6.A2" office:value-type="string">
            <text:p text:style-name="Text_20_body">Co<text:span text:style-name="T135">re group</text:span> unique mail senders</text:p>
          </table:table-cell>
          <table:table-cell table:style-name="Table6.A2" office:value-type="string">
            <text:p text:style-name="P32">4</text:p>
          </table:table-cell>
          <table:table-cell table:style-name="Table6.A2" office:value-type="string">
            <text:p text:style-name="P32">27</text:p>
          </table:table-cell>
          <table:table-cell table:style-name="Table6.A2" office:value-type="string">
            <text:p text:style-name="P32">30</text:p>
          </table:table-cell>
          <table:table-cell table:style-name="Table6.A2" office:value-type="string">
            <text:p text:style-name="P32">34</text:p>
          </table:table-cell>
          <table:table-cell table:style-name="Table6.A2" office:value-type="string">
            <text:p text:style-name="P32">35</text:p>
          </table:table-cell>
          <table:table-cell table:style-name="Table6.G2" office:value-type="string">
            <text:p text:style-name="P32">22</text:p>
          </table:table-cell>
        </table:table-row>
        <table:table-row table:style-name="Table6.1">
          <table:table-cell table:style-name="Table6.A2" office:value-type="string">
            <text:p text:style-name="Text_20_body"><text:span text:style-name="T153">Other PLC members </text:span>unique mail senders</text:p>
          </table:table-cell>
          <table:table-cell table:style-name="Table6.A2" office:value-type="string">
            <text:p text:style-name="P32">90</text:p>
          </table:table-cell>
          <table:table-cell table:style-name="Table6.A2" office:value-type="string">
            <text:p text:style-name="P32">907</text:p>
          </table:table-cell>
          <table:table-cell table:style-name="Table6.A2" office:value-type="string">
            <text:p text:style-name="P32">808</text:p>
          </table:table-cell>
          <table:table-cell table:style-name="Table6.A2" office:value-type="string">
            <text:p text:style-name="P32">1171</text:p>
          </table:table-cell>
          <table:table-cell table:style-name="Table6.A2" office:value-type="string">
            <text:p text:style-name="P32">2543</text:p>
          </table:table-cell>
          <table:table-cell table:style-name="Table6.G2" office:value-type="string">
            <text:p text:style-name="P32">1795</text:p>
          </table:table-cell>
        </table:table-row>
      </table:table>
      <text:p text:style-name="P87">Source – Maths Science teachers google group (mailing list) : <text:span text:style-name="T157">Mails from June2011 – May 2016</text:span></text:p>
      <text:p text:style-name="P87"/>
      <text:p text:style-name="P48">This is 46.<text:span text:style-name="T138">5</text:span>% of the total membership of the group, of 1<text:span text:style-name="T137">0</text:span>,<text:span text:style-name="T137">180</text:span> teachers as of <text:span text:style-name="T136">May</text:span> 2016. This suggests a very wide range/extent of teacher participation in the mailing lists. 41 of the 44 <text:span text:style-name="T153">co</text:span>re group teachers and 4695 of the non-core group teachers made posts to the forum till May 2016. <text:s/>In any mailing group there are a large percentage of ‘lurkers’ who read but do not post. Nearly half of the PLC members have posted to the lists. </text:p>
      <text:h text:style-name="P134" text:outline-level="2"><text:bookmark-start text:name="__RefHeading___Toc19262_663672711"/>Dialectic between the OER core group and the PLC<text:bookmark-end text:name="__RefHeading___Toc19262_663672711"/></text:h>
      <text:h text:style-name="Heading_20_3" text:outline-level="3"><text:bookmark-start text:name="__RefHeading___Toc4991_1517448564"/>Membership of the core group<text:bookmark-end text:name="__RefHeading___Toc4991_1517448564"/></text:h>
      <text:p text:style-name="P61">While traditionally there was a “textbook creation team”, a virtual forum in which teachers from across the state participated gave more visibility to resource creation efforts by different teachers. <text:s/>Several of the core group members were active participants in the PLC sharing ideas, resources and responding to questions from the PLC. <text:s/><text:span text:style-name="T95">Many of the core group teachers were also leading district resource persons and were frequently called upon to lead and support the district level teacher training for the STF program. The core group have been acknowledged as leaders in the PLC; this </text:span>is borne out by the email conversations in which the core group members have participated. <text:s/></text:p>
      <text:p text:style-name="P47"><text:span text:style-name="T83">Table </text:span><text:span text:style-name="T87">7</text:span><text:span text:style-name="T83"> - </text:span><text:span text:style-name="T82">Mails shared by the core group in the PLC, </text:span><text:span text:style-name="T84">per member</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Text_20_body"/>
          </table:table-cell>
          <table:table-cell table:style-name="Table13.A1" office:value-type="string">
            <text:p text:style-name="P32">Core group</text:p>
          </table:table-cell>
          <table:table-cell table:style-name="Table13.A1" office:value-type="string">
            <text:p text:style-name="P32">PLC</text:p>
          </table:table-cell>
          <table:table-cell table:style-name="Table13.D1" office:value-type="string">
            <text:p text:style-name="P32">Total Result</text:p>
          </table:table-cell>
        </table:table-row>
        <table:table-row table:style-name="Table13.1">
          <table:table-cell table:style-name="Table13.A2" office:value-type="string">
            <text:p text:style-name="Text_20_body">Number of mails</text:p>
          </table:table-cell>
          <table:table-cell table:style-name="Table13.A2" office:value-type="string">
            <text:p text:style-name="P32">4898</text:p>
          </table:table-cell>
          <table:table-cell table:style-name="Table13.A2" office:value-type="string">
            <text:p text:style-name="P32">52887</text:p>
          </table:table-cell>
          <table:table-cell table:style-name="Table13.D2" office:value-type="string">
            <text:p text:style-name="P32">57785</text:p>
          </table:table-cell>
        </table:table-row>
        <table:table-row table:style-name="Table13.1">
          <table:table-cell table:style-name="Table13.A2" office:value-type="string">
            <text:p text:style-name="Text_20_body">Number of teachers</text:p>
          </table:table-cell>
          <table:table-cell table:style-name="Table13.A2" office:value-type="string">
            <text:p text:style-name="P32">41</text:p>
          </table:table-cell>
          <table:table-cell table:style-name="Table13.A2" office:value-type="string">
            <text:p text:style-name="P32">4696</text:p>
          </table:table-cell>
          <table:table-cell table:style-name="Table13.D2" office:value-type="string">
            <text:p text:style-name="P32">4737</text:p>
          </table:table-cell>
        </table:table-row>
        <table:table-row table:style-name="Table13.1">
          <table:table-cell table:style-name="Table13.A2" office:value-type="string">
            <text:p text:style-name="Text_20_body">Mails per teacher</text:p>
          </table:table-cell>
          <table:table-cell table:style-name="Table13.A2" office:value-type="string">
            <text:p text:style-name="P32">119.46</text:p>
          </table:table-cell>
          <table:table-cell table:style-name="Table13.A2" office:value-type="string">
            <text:p text:style-name="P32">11.26</text:p>
          </table:table-cell>
          <table:table-cell table:style-name="Table13.D2" office:value-type="string">
            <text:p text:style-name="P32">12.20</text:p>
          </table:table-cell>
        </table:table-row>
      </table:table>
      <text:p text:style-name="P87">Source – Maths Science teachers google group (mailing list) : <text:span text:style-name="T157">Mails from June2011 – May 2016</text:span></text:p>
      <text:p text:style-name="P87"/>
      <text:p text:style-name="P49"><text:soft-page-break/>Core group members have shared much higher number of mails, providing leadership to the PLC. <text:s/><text:span text:style-name="T163">Some of the ways in which the core group members have participated in the PLC include:</text:span></text:p>
      <text:list xml:id="list5084855933774206279" text:style-name="L6">
        <text:list-item>
          <text:p text:style-name="P118">Sharing resources</text:p>
        </text:list-item>
        <text:list-item>
          <text:p text:style-name="P118">Giving feedback on a resource shared by a PLC member</text:p>
        </text:list-item>
        <text:list-item>
          <text:p text:style-name="P118">Clarifying questions raised – on content, pedagogy or technology</text:p>
        </text:list-item>
        <text:list-item>
          <text:p text:style-name="P118">Acknowledging a resource contribution made by another colleague</text:p>
        </text:list-item>
      </text:list>
      <text:p text:style-name="P56">Sometimes, these were conversations between core group members who were able to share critical reflections on a resource shared. <text:s/>Having benefited from processes of OER creation and review, it appears that these teachers were keen to share their learnings with the PLC.</text:p>
      <table:table table:name="Table15" table:style-name="Table15">
        <table:table-column table:style-name="Table15.A"/>
        <table:table-row>
          <table:table-cell table:style-name="Table15.A1" office:value-type="string">
            <text:p text:style-name="P94"><draw:frame draw:style-name="fr2" draw:name="Image7" text:anchor-type="paragraph" svg:x="0.122in" svg:y="0.189in" svg:width="6.3181in" svg:height="2.5516in" draw:z-index="14"><draw:image xlink:href="Pictures/1000000000000548000002220B948C6599965B17.png" xlink:type="simple" xlink:show="embed" xlink:actuate="onLoad"/></draw:frame></text:p>
            <text:p text:style-name="P94"/>
            <text:p text:style-name="P94"><draw:frame draw:style-name="fr2" draw:name="Image8" text:anchor-type="paragraph" svg:x="0.1839in" svg:y="0.1272in" svg:width="6.1516in" svg:height="2.3665in" draw:z-index="15"><draw:image xlink:href="Pictures/100000000000053A00000203F4F01774768BD022.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able:table-cell>
        </table:table-row>
        <table:table-row>
          <table:table-cell table:style-name="Table15.A2" office:value-type="string">
            <text:p text:style-name="Text_20_body">The work of a prolific contributor to the PLC has been celebrated in the media and this article was shared in the forum by one of the authors. <text:s/>While many teachers acknowledged his work, a core group member has gone beyond the customary “good work” to speak about the idea of a community of learning for teachers and appreciated his contribution for the teachers’ community</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96"><draw:frame draw:style-name="fr4" draw:name="Image11" text:anchor-type="paragraph" svg:width="6.6189in" svg:height="1.6909in" draw:z-index="13"><draw:image xlink:href="Pictures/10000000000005520000015CE817BF74CE47924D.png" xlink:type="simple" xlink:show="embed" xlink:actuate="onLoad"/></draw:frame></text:p>
          </table:table-cell>
        </table:table-row>
        <table:table-row>
          <table:table-cell table:style-name="Table18.A2" office:value-type="string">
            <text:p text:style-name="Text_20_body">This is an example of a conversation where the core group member has shared a resource for other teachers to use and is acknowledging the achievement of the other teacher (student).</text:p>
          </table:table-cell>
        </table:table-row>
      </table:table>
      <text:p text:style-name="P49"/>
      <table:table table:name="Table16" table:style-name="Table16">
        <table:table-column table:style-name="Table16.A"/>
        <table:table-row>
          <table:table-cell table:style-name="Table16.A1" office:value-type="string">
            <text:p text:style-name="P94"><draw:frame draw:style-name="fr4" draw:name="Image9" text:anchor-type="paragraph" svg:width="6.6189in" svg:height="2.0972in" draw:z-index="10"><draw:image xlink:href="Pictures/100000000000053D000001A9AF6DEBD9E46509B6.png" xlink:type="simple" xlink:show="embed" xlink:actuate="onLoad"/></draw:frame></text:p>
          </table:table-cell>
        </table:table-row>
        <table:table-row>
          <table:table-cell table:style-name="Table16.A2" office:value-type="string">
            <text:p text:style-name="P95">In yet another example, another PLC member has asked a clarification on an academic process, which is being responded to by the core group member.</text:p>
          </table:table-cell>
        </table:table-row>
      </table:table>
      <text:h text:style-name="P136" text:outline-level="3"><text:bookmark-start text:name="__RefHeading___Toc4999_1517448564"/>PLC both a source and context for OER creation<text:bookmark-end text:name="__RefHeading___Toc4999_1517448564"/></text:h>
      <text:p text:style-name="P50"><text:span text:style-name="T93">The core group was </text:span>formed as a small sub-group of the PLC <text:span text:style-name="T93">with the objective of creating a cohort that will be trained in the creation and publishing of digital content in the form of OER. <text:s/>However, they seemed to imagine the resource creation as a more distributed activity situated in the PLC. <text:s/>T</text:span><text:span text:style-name="T26">hey seem</text:span><text:span text:style-name="T45">ed</text:span><text:span text:style-name="T26"> to have the opinion that the resource creation is a larger collective activity and the core group is seen more to have a custodial/ editorial function. <text:s/></text:span><text:span text:style-name="T27">This is exemplified in their articulation of the role and the expectations of the PLC </text:span><text:span text:style-name="T37">in the focus group discussions</text:span><text:span text:style-name="T27">.</text:span></text:p>
      <text:h text:style-name="P125" text:outline-level="4"><text:bookmark-start text:name="__RefHeading___Toc5279_520906967"/><text:span text:style-name="T90">I</text:span>nfluence of PLC interactions on OER design and creation<text:bookmark-end text:name="__RefHeading___Toc5279_520906967"/></text:h>
      <text:p text:style-name="P51">One of the distinctive features of the OER creation process was the participatory nature of the OER creation. <text:s/>The teachers ideated on the form of the resource repository, the structure, the kinds of resources to add as well as the user interface to the platform. <text:s/>The <text:span text:style-name="T94">content organization on KOER has largely flown from these discussions during which the core group articulated teacher needs in terms of </text:span><text:soft-page-break/><text:span text:style-name="T94">content and ways of representation. <text:s/>The table below shows an example of how a resource is getting developed through conversations within the PLC.</text:span></text:p>
      <table:table table:name="Table17" table:style-name="Table17">
        <table:table-column table:style-name="Table17.A"/>
        <table:table-row>
          <table:table-cell table:style-name="Table17.A1" office:value-type="string">
            <text:p text:style-name="P94"><draw:frame draw:style-name="fr4" draw:name="Image10" text:anchor-type="paragraph" svg:width="6.6189in" svg:height="3.0193in" draw:z-index="11"><draw:image xlink:href="Pictures/1000000000000539000002621E4E2CCFE00EB2E3.png" xlink:type="simple" xlink:show="embed" xlink:actuate="onLoad"/></draw:frame></text:p>
          </table:table-cell>
        </table:table-row>
        <table:table-row>
          <table:table-cell table:style-name="Table17.A2" office:value-type="string">
            <text:p text:style-name="Text_20_body">A resource with an activity for using a simulation has been shared by a teacher,yet another active member of the PLC. <text:s/>The resource has created a context for teachers to have a conversation on how to address different kinds of learners and resulted in the teacher revising her creation.</text:p>
          </table:table-cell>
        </table:table-row>
      </table:table>
      <text:p text:style-name="P17"><text:span text:style-name="T171">O</text:span>ne key idea of OER creation emerged from the core group’s articulation of resource requirements <text:span text:style-name="T96">was the development of video resources for conducting science experiments. <text:s/>This requirement articulation emerged from the PLC – the state-level forum as well as the district level forums – that the core group is a part of.</text:span></text:p>
      <text:p text:style-name="Text_20_body">Another <text:span text:style-name="T171">reason for this perspective on OER creation perhaps came </text:span>from the difficulties – technological, pedagogical and logistical – faced by this core group in terms of creating resources. <text:s/>While the processes of OER creation enabled their development, many teachers expressed dissatisfaction at the rate of OER creation. <text:s/><text:span text:style-name="T97">They felt that the community is an important source of resources and that “</text:span><text:span text:style-name="T98">teachers feel the need and they respond to the need</text:span><text:span text:style-name="T97">”. <text:s/>They perceived the large size of the government school as a strength and felt that </text:span><text:span text:style-name="T26">the resource creation group should be expanded to include more members from the PLC. </text:span><text:span text:style-name="T45">They also </text:span><text:span text:style-name="T26">suggested the formation of district level </text:span><text:span text:style-name="T38">resource </text:span><text:span text:style-name="T26">groups. <text:s/></text:span></text:p>
      <text:p text:style-name="P18"><text:span text:style-name="T26">T</text:span><text:span text:style-name="T20">he core group of teachers </text:span><text:span text:style-name="T28">were also able to articulate key technological requirements of the resource repository. <text:s/>These included methods of easily embedding resources from other cloud based repositories that teachers access (as an example, embedding a slideshare presentation or a video), </text:span><text:soft-page-break/><text:span text:style-name="T28">visually intuitive editing features, categorization of resources and advanced search features that allows for search on multiple dimensions.</text:span></text:p>
      <text:h text:style-name="P125" text:outline-level="4"><text:bookmark-start text:name="__RefHeading___Toc5281_520906967"/>PLC as a forum for disseminating <text:span text:style-name="T92">OER</text:span><text:bookmark-end text:name="__RefHeading___Toc5281_520906967"/></text:h>
      <text:p text:style-name="P19">As we saw earlier, “textbook creation” was seen as a career progression by teachers. <text:s/>With the digital enabling multiple methods of resourc<text:span text:style-name="T171">e creation, more teachers came to be acknowledged as </text:span><text:s/>differen<text:span text:style-name="T173">S</text:span>t resource creators. <text:s/><text:span text:style-name="T27">T</text:span><text:span text:style-name="T20">here was also a strong sense of community and identity the core group of teachers expressed with the PLC. <text:s/></text:span><text:span text:style-name="T29">In addition to the personal recognition of themselves, they clearly articulated the need to “</text:span><text:span text:style-name="T99">popularize</text:span><text:span text:style-name="T29">” the OER platform among teachers, through the PLC. <text:s/>They also recommended that all the teachers should be part of the PLC</text:span><text:span text:style-name="T29"><text:note text:id="ftn17" text:note-class="footnote"><text:note-citation>17</text:note-citation><text:note-body><text:p text:style-name="P82">The technology training proceeded in phases – determined by the availability of ICT infrastructure. <text:s/>This meant that all the teachers were covered over a period of time; by the end of the period of study in 2016, all mathematics and science teachers had become part of the PLC.</text:p></text:note-body></text:note></text:span><text:span text:style-name="T29">. <text:s/></text:span><text:span text:style-name="T30">Disseminating KOER through newsletters, writings in departmental communication pieces, talking about the OER platform in other training programs. <text:s/>They </text:span><text:span text:style-name="T45">argued that </text:span><text:span text:style-name="T30">it was important to receive the feedback from the teachers in the PLC who they felt were their peers. <text:s/></text:span><text:span text:style-name="T31">The core group suggested discussion forums to be set up where comments from the PLC could be obtained for </text:span><text:span text:style-name="T45">revising </text:span><text:span text:style-name="T31">the resources. <text:s/></text:span></text:p>
      <text:p text:style-name="P20">Another interesting aspect we observed is that teachers who are part of the core group, in addition to creating and publishing on the resource repository, continued to share resources on the PLC, clearly suggesting that they see the PLC as an important way to disseminate the OER.</text:p>
      <table:table table:name="Table3" table:style-name="Table3">
        <table:table-column table:style-name="Table3.A"/>
        <table:table-row table:style-name="Table3.1">
          <table:table-cell table:style-name="Table3.A1" office:value-type="string">
            <text:p text:style-name="P93"><draw:frame draw:style-name="fr3" draw:name="Image1" text:anchor-type="paragraph" svg:width="6.6193in" svg:height="2.8417in" draw:z-index="12"><draw:image xlink:href="Pictures/10000000000005390000023EF9B9E7755FA053C7.png" xlink:type="simple" xlink:show="embed" xlink:actuate="onLoad"/></draw:frame></text:p>
          </table:table-cell>
        </table:table-row>
        <table:table-row table:style-name="Table3.1">
          <table:table-cell table:style-name="Table3.A2" office:value-type="string">
            <text:p text:style-name="P97">This core group teacher started a project to systematically prepare students for the exams and shared resources in a series in the forum, which was received well in the forum and even created a sense of anticipation in the teachers. <text:s/>In this thread, another core group teacher is seen acknowledging the mail.</text:p>
          </table:table-cell>
        </table:table-row>
      </table:table>
      <text:p text:style-name="P9"><text:soft-page-break/>It seemed that from the core group’s perspective, the OER creation process derived its validity being embedded in the PLC, and the larger teacher community. <text:s/></text:p>
      <text:h text:style-name="P129" text:outline-level="1"><text:bookmark-start text:name="__RefHeading___Toc6563_1517448564"/>Challenges<text:bookmark-end text:name="__RefHeading___Toc6563_1517448564"/></text:h>
      <text:list xml:id="list355478461542413501" text:style-name="L7">
        <text:list-item>
          <text:p text:style-name="P119">While the PLC and the OER creation process have a dialectic that can provide a model of sustainable, contextually relevant resource creation, <text:span text:style-name="T101">there need to be departmental processes and structures that will allow continuous cycle of creation-feedback-review.</text:span></text:p>
        </text:list-item>
        <text:list-item>
          <text:p text:style-name="P120">OER publishing requires technological capabilities, pedagogical understanding and content mastery, alongwith a good understanding of the principles of organizing content in coherent frameworks. <text:s/>It is difficult for teachers to develop all these skills, especially when they are loaded with the demands of a high school syllabus. <text:s/>Therefore, the core group publishing of resources – either created by themselves or accessed from the PLC – was not happening to the extent the authors had imagined.</text:p>
        </text:list-item>
        <text:list-item>
          <text:p text:style-name="P121">Technology is impacting society continuously. <text:s/>Social media, “easy to consume” cloud based content solutions seem attractive in the face of long term efforts l<text:span text:style-name="T139">i</text:span>ke T<text:span text:style-name="T172">eacher Professional Development. Whatsapp based sharing seemed to be preferred by many teachers over an organized repository even though the long term benefits were accepted and understood.</text:span> <text:span text:style-name="T155">A participatory approach to OER creation in a teacher community is an idea that takes time to mature and needs the support of policy makers and educational administration.</text:span></text:p>
        </text:list-item>
      </text:list>
      <text:h text:style-name="Heading_20_1" text:outline-level="1"><text:bookmark-start text:name="__RefHeading___Toc6565_1517448564"/>Conclusion<text:bookmark-end text:name="__RefHeading___Toc6565_1517448564"/></text:h>
      <text:p text:style-name="P53">A mailing list based PLC <text:span text:style-name="T164">that can support continuous teacher professional development, is in line with the recommendations for principles of in-service teacher education. <text:s/>Teacher capacity building in digital methods is critical for this possibility to be actualized. <text:s/>The creation of a free and open technology environment is essential for such collaborative models to develop and sustain.</text:span></text:p>
      <text:p text:style-name="P53">It appears that neither the PLC <text:span text:style-name="T172">n</text:span>or the core group <text:span text:style-name="T172">c</text:span>ould have been sufficient unto itself. <text:s/>We can see that the PLC interactions, in which the core group were active participants, gave them the ideas for the form, structure and content of the repository. <text:s/>On the other hand, the core group with their incremental experiences in resource creation were able to provide academic leadership to the PLC. <text:s/>It is important to note that this dialectic has emerged almost entirely autonomously without any departmental guideline or directive, suggesting that community spaces can indeed support OER creation and teacher professional development.</text:p>
      <text:p text:style-name="P52"><text:soft-page-break/>An OER creation process, embedded in a larger PLC which has created the required ecosystem for techno-pedagogic intergration seems to hold the promise of sustained resource creation. A distributed resource creation model, where teachers are contributing “all for all” (as quoted by a core group teacher) can potentially leverage the large size of a government school system, to create diverse, contextual and a large variety resources. <text:s/>However, reviewing, giving feedback and sustaining the publishing all need to be prioritized by the Education department and needs to be balanced within the overall load of the teacher. Resource provisioning in terms of training, infrastructure and teachers’ time to task management are critical for this model to sustain.</text:p>
      <text:p text:style-name="P52"/>
      <text:p text:style-name="P52"/>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text-properties style:font-name="Nimbus Roman No9 L" fo:font-family="'Nimbus Roman No9 L'" style:font-style-name="Regular" style:font-family-generic="roman" style:font-pitch="variable" officeooo:rsid="0041f97b"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00%" fo:text-indent="0in" style:auto-text-indent="false" style:writing-mode="pag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00%" fo:text-indent="0in" style:auto-text-indent="false" style:writing-mode="pag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00%" fo:text-indent="0in" style:auto-text-indent="false" style:writing-mode="pag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299in" fo:margin-bottom="0.1in" loext:contextual-spacing="false" style:writing-mode="page"/>
      <style:text-properties fo:color="#800000" fo:font-size="14pt"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0000ff" fo:font-size="12pt" fo:font-style="italic"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color="#000000"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officeooo:rsid="07cd063f" officeooo:paragraph-rsid="003b5c26" style:font-size-asian="10pt" style:font-size-complex="10pt"/>
    </style:style>
    <style:style style:name="MT1" style:family="text">
      <style:text-properties officeooo:rsid="003b5c26"/>
    </style:style>
    <style:page-layout style:name="Mpm1">
      <style:page-layout-properties fo:page-width="8.2701in" fo:page-height="11.6902in" style:num-format="1" style:print-orientation="portrait" fo:margin-top="0.7in" fo:margin-bottom="0.7in" fo:margin-left="0.7in" fo:margin-right="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193in" fo:margin-left="0in" fo:margin-right="0in" fo:margin-top="0.0598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llaborative OER adoption by a Professional Learning Community<text:tab/><text:tab/><text:span text:style-name="MT1"> <text:tab/><text:tab/></text:span><text:span text:style-name="MT1"><text:page-number text:select-page="current">20</text:page-number></text:span><text:span text:style-name="MT1">/</text:span><text:span text:style-name="MT1"><text:page-count>20</text:page-count></text:span></text:p>
      </style:footer>
    </style:master-page>
    <style:master-page style:name="Converted162" style:page-layout-name="Mpm2">
      <style:footer>
        <text:p text:style-name="Footer"/>
      </style:footer>
    </style:master-page>
    <style:master-page style:name="Converted165" style:page-layout-name="Mpm2">
      <style:footer>
        <text:p text:style-name="Footer"/>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jani </meta:initial-creator>
    <meta:creation-date>2017-10-16T00:21:07.415516750</meta:creation-date>
    <dc:date>2017-12-01T13:27:17.750431694</dc:date>
    <dc:creator>Guru Kasinathan</dc:creator>
    <meta:editing-duration>PT19H40M7S</meta:editing-duration>
    <meta:editing-cycles>286</meta:editing-cycles>
    <meta:generator>LibreOffice/5.1.6.2$Linux_X86_64 LibreOffice_project/10m0$Build-2</meta:generator>
    <meta:document-statistic meta:table-count="15" meta:image-count="10" meta:object-count="0" meta:page-count="20" meta:paragraph-count="332" meta:word-count="6304" meta:character-count="39771" meta:non-whitespace-character-count="33586"/>
  </office:meta>
</office:document-meta>
</file>